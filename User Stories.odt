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paragraph-properties fo:margin-left="0.5in">
        <style:tab-stops/>
      </style:paragraph-properties>
    </style:style>
    <style:style style:name="T5" style:parent-style-name="Absatz-Standardschriftart" style:family="text">
      <style:text-properties fo:font-style="italic" style:font-style-asian="italic" style:font-style-complex="italic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T9" style:parent-style-name="Absatz-Standardschriftart" style:family="text">
      <style:text-properties fo:font-style="italic" style:font-style-asian="italic" style:font-style-complex="italic"/>
    </style:style>
    <style:style style:name="T10" style:parent-style-name="Absatz-Standardschriftar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paragraph-properties fo:margin-left="0.5in">
        <style:tab-stops/>
      </style:paragraph-properties>
    </style:style>
    <style:style style:name="T13" style:parent-style-name="Absatz-Standardschriftart" style:family="text">
      <style:text-properties fo:font-style="italic" style:font-style-asian="italic" style:font-style-complex="italic"/>
    </style:style>
    <style:style style:name="T14" style:parent-style-name="Absatz-Standardschriftar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paragraph-properties fo:margin-left="0.5in">
        <style:tab-stops/>
      </style:paragraph-properties>
    </style:style>
    <style:style style:name="T18" style:parent-style-name="Absatz-Standardschriftart" style:family="text">
      <style:text-properties fo:font-style="italic" style:font-style-asian="italic" style:font-style-complex="italic"/>
    </style:style>
    <style:style style:name="T19" style:parent-style-name="Absatz-Standardschriftart" style:family="text">
      <style:text-properties fo:font-style="italic" style:font-style-asian="italic" style:font-style-complex="italic"/>
    </style:style>
    <style:style style:name="T20" style:parent-style-name="Absatz-Standardschriftart" style:family="text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T23" style:parent-style-name="Absatz-Standardschriftart" style:family="text">
      <style:text-properties fo:font-style="italic" style:font-style-asian="italic" style:font-style-complex="italic"/>
    </style:style>
    <style:style style:name="T24" style:parent-style-name="Absatz-Standardschriftart" style:family="text">
      <style:text-properties fo:font-style="italic" style:font-style-asian="italic" style:font-style-complex="italic"/>
    </style:style>
    <style:style style:name="T25" style:parent-style-name="Absatz-Standardschriftart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7" style:parent-style-name="Standard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T30" style:parent-style-name="Absatz-Standardschriftart" style:family="text">
      <style:text-properties fo:font-style="italic" style:font-style-asian="italic" style:font-style-complex="italic"/>
    </style:style>
    <style:style style:name="T31" style:parent-style-name="Absatz-Standardschriftart" style:family="text">
      <style:text-properties fo:font-style="italic" style:font-style-asian="italic" style:font-style-complex="italic"/>
    </style:style>
    <style:style style:name="T32" style:parent-style-name="Absatz-Standardschriftart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T35" style:parent-style-name="Absatz-Standardschriftart" style:family="text">
      <style:text-properties fo:font-style="italic" style:font-style-asian="italic" style:font-style-complex="italic"/>
    </style:style>
    <style:style style:name="T36" style:parent-style-name="Absatz-Standardschriftart" style:family="text">
      <style:text-properties fo:font-style="italic" style:font-style-asian="italic" style:font-style-complex="italic"/>
    </style:style>
    <style:style style:name="T37" style:parent-style-name="Absatz-Standardschriftart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T40" style:parent-style-name="Absatz-Standardschriftart" style:family="text">
      <style:text-properties fo:font-style="italic" style:font-style-asian="italic" style:font-style-complex="italic"/>
    </style:style>
    <style:style style:name="T41" style:parent-style-name="Absatz-Standardschriftart" style:family="text">
      <style:text-properties fo:font-style="italic" style:font-style-asian="italic" style:font-style-complex="italic"/>
    </style:style>
    <style:style style:name="T42" style:parent-style-name="Absatz-Standardschriftart" style:family="text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T46" style:parent-style-name="Absatz-Standardschriftart" style:family="text">
      <style:text-properties fo:font-style="italic" style:font-style-asian="italic" style:font-style-complex="italic"/>
    </style:style>
    <style:style style:name="T47" style:parent-style-name="Absatz-Standardschriftar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User Stories</text:p>
      <text:p text:style-name="Standard">Hier sind alle User Stories<text:s/>von den Usern und allen möglichen Rollen die ein User im System annehmen kann.</text:p>
      <text:p text:style-name="P2">User<text:s/></text:p>
      <text:p text:style-name="P3">1. Alle Gruppenchats sehen</text:p>
      <text:p text:style-name="P4">Als<text:s/><text:span text:style-name="T5">User</text:span><text:s/>möchte ich<text:s/><text:span text:style-name="T6">alle existierenden Gruppenchats sehen</text:span>, damit ich entscheiden kann, welchem Chat ich beitreten möchte.</text:p>
      <text:p text:style-name="P7">2. Gruppentitel sehen</text:p>
      <text:p text:style-name="P8">Als<text:s/><text:span text:style-name="T9">User</text:span><text:s/>möchte ich<text:s/><text:span text:style-name="T10">den Titel eines Gruppenchats sehen</text:span>, damit ich weiß, worum es in der Gruppe geht.</text:p>
      <text:p text:style-name="P11">3. Join‑Request senden</text:p>
      <text:p text:style-name="P12">Als<text:s/><text:span text:style-name="T13">User</text:span><text:s/>möchte ich<text:s/><text:span text:style-name="T14">eine Beitrittsanfrage an einen Gruppenchat senden</text:span>, damit ich Mitglied der Gruppe werden kann.</text:p>
      <text:p text:style-name="P15">Gruppenchat‑Member</text:p>
      <text:p text:style-name="P16">4. Nachrichten senden</text:p>
      <text:p text:style-name="P17">Als<text:s/><text:span text:style-name="T18">Gruppenchat</text:span><text:span text:style-name="T19">‑Member</text:span><text:s/>möchte ich<text:s/><text:span text:style-name="T20">Nachrichten im Chat schreiben</text:span>, damit ich mit anderen Mitgliedern kommunizieren kann.</text:p>
      <text:p text:style-name="P21">5. Nachrichten lesen</text:p>
      <text:p text:style-name="P22">Als<text:s/><text:span text:style-name="T23">Gruppenchat</text:span><text:span text:style-name="T24">‑Member</text:span><text:s/>möchte ich<text:s/><text:span text:style-name="T25">alle Nachrichten der Gruppe sehen</text:span>, damit ich den Gesprächsverlauf nachvollziehen kann.</text:p>
      <text:p text:style-name="P26"><text:line-break/><text:line-break/><text:line-break/><text:line-break/><text:line-break/></text:p>
      <text:soft-page-break/>
      <text:p text:style-name="P27">Gruppenchat‑Owner</text:p>
      <text:p text:style-name="P28">6. Join‑Requests annehmen</text:p>
      <text:p text:style-name="P29">Als<text:s/><text:span text:style-name="T30">Gruppenchat</text:span><text:span text:style-name="T31">‑Owner</text:span><text:s/>möchte ich<text:s/><text:span text:style-name="T32">Beitrittsanfragen annehmen</text:span>, damit neue Mitglieder der Gruppe beitreten können.</text:p>
      <text:p text:style-name="P33">7. Join‑Requests ablehnen</text:p>
      <text:p text:style-name="P34">Als<text:s/><text:span text:style-name="T35">Gruppenchat</text:span><text:span text:style-name="T36">‑Owner</text:span><text:s/>möchte ich<text:s/><text:span text:style-name="T37">Beitrittsanfragen ablehnen</text:span>, damit ich kontrollieren kann, wer der Gruppe NICHT beitritt.</text:p>
      <text:p text:style-name="P38">8. Mitglieder entfernen</text:p>
      <text:p text:style-name="P39">Als<text:s/><text:span text:style-name="T40">Gruppenchat</text:span><text:span text:style-name="T41">‑Owner</text:span><text:s/>möchte ich<text:s/><text:span text:style-name="T42">Mitglieder aus der Gruppe entfernen (kicken)</text:span>, damit ich bei Fehlverhalten oder Spam eingreifen kann.</text:p>
      <text:p text:style-name="P43">Admin</text:p>
      <text:p text:style-name="P44">9. Gruppenchats löschen</text:p>
      <text:p text:style-name="P45">Als<text:s/><text:span text:style-name="T46">Admin</text:span><text:s/>möchte ich<text:s/><text:span text:style-name="T47">Gruppenchats löschen können</text:span>, damit ich unangebrachte oder inaktive Gruppen entfernen kann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n Arandjelovic</meta:initial-creator>
    <dc:creator>Alen Arandjelovic</dc:creator>
    <meta:creation-date>2026-04-07T14:05:00Z</meta:creation-date>
    <dc:date>2026-04-07T14:16:00Z</dc:date>
    <meta:template xlink:href="Normal" xlink:type="simple"/>
    <meta:editing-cycles>1</meta:editing-cycles>
    <meta:editing-duration>PT0S</meta:editing-duration>
    <meta:document-statistic meta:page-count="2" meta:paragraph-count="2" meta:word-count="216" meta:character-count="1447" meta:row-count="10" meta:non-whitespace-character-count="1233"/>
  </office:meta>
</office:document-meta>
</file>