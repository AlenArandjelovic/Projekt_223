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line-height="100%"/>
      <style:text-properties fo:font-weight="bold" style:font-weight-asian="bold" style:font-weight-complex="bold"/>
    </style:style>
    <style:style style:name="P2" style:parent-style-name="Standard" style:family="paragraph">
      <style:paragraph-properties fo:line-height="100%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T7" style:parent-style-name="Absatz-Standardschriftart" style:family="text">
      <style:text-properties fo:font-weight="bold" style:font-weight-asian="bold" style:font-weight-complex="bold"/>
    </style:style>
    <style:style style:name="P8" style:parent-style-name="Standard" style:list-style-name="LFO3" style:family="paragraph">
      <style:paragraph-properties fo:line-height="100%"/>
    </style:style>
    <style:style style:name="P9" style:parent-style-name="Standard" style:list-style-name="LFO3" style:family="paragraph">
      <style:paragraph-properties fo:line-height="100%"/>
    </style:style>
    <style:style style:name="P10" style:parent-style-name="Standard" style:list-style-name="LFO3" style:family="paragraph">
      <style:paragraph-properties fo:line-height="100%"/>
    </style:style>
    <style:style style:name="P11" style:parent-style-name="Standard" style:list-style-name="LFO3" style:family="paragraph">
      <style:paragraph-properties fo:line-height="100%"/>
    </style:style>
    <style:style style:name="P12" style:parent-style-name="Standard" style:family="paragraph">
      <style:paragraph-properties fo:line-height="100%"/>
    </style:style>
    <style:style style:name="T13" style:parent-style-name="Absatz-Standardschriftart" style:family="text">
      <style:text-properties fo:font-weight="bold" style:font-weight-asian="bold" style:font-weight-complex="bold"/>
    </style:style>
    <style:style style:name="T14" style:parent-style-name="Absatz-Standardschriftart" style:family="text">
      <style:text-properties fo:font-weight="bold" style:font-weight-asian="bold" style:font-weight-complex="bold"/>
    </style:style>
    <style:style style:name="T15" style:parent-style-name="Absatz-Standardschriftart" style:family="text">
      <style:text-properties fo:font-weight="bold" style:font-weight-asian="bold" style:font-weight-complex="bold"/>
    </style:style>
    <style:style style:name="P16" style:parent-style-name="Standard" style:family="paragraph">
      <style:paragraph-properties fo:line-height="100%"/>
    </style:style>
    <style:style style:name="P17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P18" style:parent-style-name="Standard" style:family="paragraph">
      <style:paragraph-properties fo:line-height="100%"/>
      <style:text-properties style:font-weight-complex="bold"/>
    </style:style>
    <style:style style:name="P19" style:parent-style-name="Standard" style:family="paragraph">
      <style:paragraph-properties fo:line-height="100%"/>
    </style:style>
    <style:style style:name="P20" style:parent-style-name="Standard" style:family="paragraph">
      <style:paragraph-properties fo:line-height="100%"/>
    </style:style>
    <style:style style:name="P21" style:parent-style-name="Standard" style:family="paragraph">
      <style:paragraph-properties fo:line-height="100%"/>
    </style:style>
    <style:style style:name="P22" style:parent-style-name="Standard" style:family="paragraph">
      <style:paragraph-properties fo:line-height="100%"/>
    </style:style>
    <style:style style:name="P23" style:parent-style-name="Standard" style:family="paragraph">
      <style:paragraph-properties fo:line-height="100%"/>
    </style:style>
    <style:style style:name="P24" style:parent-style-name="Standard" style:family="paragraph">
      <style:paragraph-properties fo:line-height="100%"/>
    </style:style>
    <style:style style:name="P25" style:parent-style-name="Standard" style:family="paragraph">
      <style:paragraph-properties fo:line-height="100%"/>
    </style:style>
    <style:style style:name="P26" style:parent-style-name="Standard" style:family="paragraph">
      <style:paragraph-properties fo:line-height="100%"/>
    </style:style>
    <style:style style:name="P27" style:parent-style-name="Standard" style:family="paragraph">
      <style:paragraph-properties fo:line-height="100%"/>
    </style:style>
    <style:style style:name="P28" style:parent-style-name="Standard" style:family="paragraph">
      <style:paragraph-properties fo:line-height="100%"/>
    </style:style>
    <style:style style:name="P29" style:parent-style-name="Standard" style:family="paragraph">
      <style:paragraph-properties fo:line-height="100%"/>
    </style:style>
    <style:style style:name="P30" style:parent-style-name="Standard" style:family="paragraph">
      <style:paragraph-properties fo:line-height="100%"/>
    </style:style>
    <style:style style:name="P31" style:parent-style-name="Standard" style:family="paragraph">
      <style:paragraph-properties fo:line-height="100%"/>
    </style:style>
    <style:style style:name="P32" style:parent-style-name="Standard" style:family="paragraph">
      <style:paragraph-properties fo:line-height="100%"/>
    </style:style>
    <style:style style:name="P33" style:parent-style-name="Standard" style:family="paragraph">
      <style:paragraph-properties fo:line-height="100%"/>
    </style:style>
    <style:style style:name="P34" style:parent-style-name="Standard" style:family="paragraph">
      <style:paragraph-properties fo:line-height="100%"/>
    </style:style>
    <style:style style:name="P35" style:parent-style-name="Standard" style:family="paragraph">
      <style:paragraph-properties fo:line-height="100%"/>
    </style:style>
  </office:automatic-styles>
  <office:body>
    <office:text text:use-soft-page-breaks="true">
      <text:p text:style-name="P1">Projektidee</text:p>
      <text:p text:style-name="P2">Das Projekt ist ein<text:s/><text:span text:style-name="T3">Multi</text:span><text:span text:style-name="T4">‑User Messaging</text:span><text:span text:style-name="T5">‑System</text:span>, in dem Benutzer in<text:s/><text:span text:style-name="T6">öffentlichen Gruppen</text:span><text:span text:style-name="T7">‑Chats</text:span><text:s/>miteinander kommunizieren können. Jeder User kann:</text:p>
      <text:list text:style-name="LFO3" text:continue-numbering="true">
        <text:list-item>
          <text:p text:style-name="P8">Nachrichten schreiben, die sofort für alle anderen sichtbar sind</text:p>
        </text:list-item>
        <text:list-item>
          <text:p text:style-name="P9">eigene Gruppen erstellen</text:p>
        </text:list-item>
        <text:list-item>
          <text:p text:style-name="P10">zwischen verschiedenen Gruppen wechseln<text:s/>(an denen er aboniert ist)</text:p>
        </text:list-item>
        <text:list-item>
          <text:p text:style-name="P11">alle Nachrichten der ausgewählten Gruppe sehen</text:p>
        </text:list-item>
      </text:list>
      <text:p text:style-name="P12">Damit funktioniert das System ähnlich wie<text:s/>Social Media‑Gruppen — mit dem Unterschied, dass<text:s/><text:span text:style-name="T13">jede Gruppe<text:s/></text:span><text:span text:style-name="T14">sichtbar</text:span><text:span text:style-name="T15"><text:s/>ist</text:span><text:s/>und von jedem<text:s/>,auf Anfrage,<text:s/>betreten werden kann.</text:p>
      <text:p text:style-name="P16"/>
      <text:p text:style-name="P17">System Rollen</text:p>
      <text:p text:style-name="P18">Im System gibt es verschieden Rollen</text:p>
      <text:p text:style-name="P19">User:<text:s/></text:p>
      <text:p text:style-name="P20">- Sieht alle Gruppenchats</text:p>
      <text:p text:style-name="P21">- kann Gruppenchat-Titel sehen</text:p>
      <text:p text:style-name="P22">- kann Join-Request senden</text:p>
      <text:p text:style-name="P23"/>
      <text:p text:style-name="P24">Gruppenchat-Member:</text:p>
      <text:p text:style-name="P25">- kann im<text:s/>Chat<text:s/>Narchichten senden</text:p>
      <text:p text:style-name="P26">- sieht alle Narchichten des Chats</text:p>
      <text:p text:style-name="P27"/>
      <text:p text:style-name="P28">Gruppenchat-Owner:</text:p>
      <text:p text:style-name="P29">- kann<text:s/>Beitrits-Requests annehmen/ablehnen</text:p>
      <text:p text:style-name="P30">- kann Members kicken<text:s/></text:p>
      <text:p text:style-name="P31"/>
      <text:p text:style-name="P32">Admin:</text:p>
      <text:p text:style-name="P33">- kann<text:s/>Gruppenchats<text:s/>löschen</text:p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n Arandjelovic</meta:initial-creator>
    <dc:creator>Alen Arandjelovic</dc:creator>
    <meta:creation-date>2026-04-07T13:45:00Z</meta:creation-date>
    <dc:date>2026-04-07T14:04:00Z</dc:date>
    <meta:template xlink:href="Normal" xlink:type="simple"/>
    <meta:editing-cycles>1</meta:editing-cycles>
    <meta:editing-duration>PT0S</meta:editing-duration>
    <meta:document-statistic meta:page-count="1" meta:paragraph-count="1" meta:word-count="132" meta:character-count="884" meta:row-count="6" meta:non-whitespace-character-count="753"/>
  </office:meta>
</office:document-meta>
</file>