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list-format-name="NLF0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list-format-name="NLF0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list-format-name="NLF0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list-format-name="NLF0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list-format-name="NLF0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ptos Display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 fo:text-align="center"/>
    </style:style>
    <style:style style:name="P2" style:parent-style-name="Untertitel" style:family="paragraph">
      <style:paragraph-properties fo:text-align="center"/>
    </style:style>
    <style:style style:name="P3" style:parent-style-name="Untertitel" style:family="paragraph">
      <style:paragraph-properties fo:text-align="center"/>
    </style:style>
    <style:style style:name="T4" style:parent-style-name="Absatz-Standardschriftart" style:family="text">
      <style:text-properties style:font-name="Segoe UI Emoji" style:font-name-complex="Segoe UI Emoji"/>
    </style:style>
    <style:style style:name="T5" style:parent-style-name="Absatz-Standardschriftart" style:family="text">
      <style:text-properties style:font-name="Segoe UI Emoji" style:font-name-complex="Segoe UI Emoji"/>
    </style:style>
    <style:style style:name="P6" style:parent-style-name="Standard" style:family="paragraph">
      <style:paragraph-properties fo:break-before="page"/>
      <style:text-properties style:font-name="Segoe UI Emoji" style:font-name-asian="Times New Roman" style:font-name-complex="Segoe UI Emoji" fo:font-weight="bold" style:font-weight-asian="bold" style:font-weight-complex="bold" fo:letter-spacing="-0.0069in" style:letter-kerning="true" fo:font-size="14pt" style:font-size-asian="14pt" style:font-size-complex="14pt"/>
    </style:style>
    <style:style style:name="P7" style:parent-style-name="Verzeichnis1" style:family="paragraph">
      <style:paragraph-properties>
        <style:tab-stops>
          <style:tab-stop style:type="right" style:leader-style="dotted" style:leader-text="." style:position="6.525in"/>
        </style:tab-stops>
      </style:paragraph-properties>
    </style:style>
    <style:style style:name="P8" style:parent-style-name="Verzeichnis1" style:family="paragraph">
      <style:paragraph-properties>
        <style:tab-stops>
          <style:tab-stop style:type="right" style:leader-style="dotted" style:leader-text="." style:position="6.525in"/>
        </style:tab-stops>
      </style:paragraph-properties>
    </style:style>
    <style:style style:name="P9" style:parent-style-name="Verzeichnis1" style:family="paragraph">
      <style:paragraph-properties>
        <style:tab-stops>
          <style:tab-stop style:type="right" style:leader-style="dotted" style:leader-text="." style:position="6.525in"/>
        </style:tab-stops>
      </style:paragraph-properties>
    </style:style>
    <style:style style:name="P10" style:parent-style-name="Verzeichnis2" style:family="paragraph">
      <style:paragraph-properties>
        <style:tab-stops>
          <style:tab-stop style:type="right" style:leader-style="dotted" style:leader-text="." style:position="6.3583in"/>
        </style:tab-stops>
      </style:paragraph-properties>
    </style:style>
    <style:style style:name="P11" style:parent-style-name="Verzeichnis2" style:family="paragraph">
      <style:paragraph-properties>
        <style:tab-stops>
          <style:tab-stop style:type="right" style:leader-style="dotted" style:leader-text="." style:position="6.3583in"/>
        </style:tab-stops>
      </style:paragraph-properties>
    </style:style>
    <style:style style:name="P12" style:parent-style-name="Verzeichnis3" style:family="paragraph">
      <style:paragraph-properties>
        <style:tab-stops>
          <style:tab-stop style:type="right" style:leader-style="dotted" style:leader-text="." style:position="6.1916in"/>
        </style:tab-stops>
      </style:paragraph-properties>
    </style:style>
    <style:style style:name="P13" style:parent-style-name="Verzeichnis3" style:family="paragraph">
      <style:paragraph-properties>
        <style:tab-stops>
          <style:tab-stop style:type="right" style:leader-style="dotted" style:leader-text="." style:position="6.1916in"/>
        </style:tab-stops>
      </style:paragraph-properties>
    </style:style>
    <style:style style:name="P14" style:parent-style-name="Verzeichnis2" style:family="paragraph">
      <style:paragraph-properties>
        <style:tab-stops>
          <style:tab-stop style:type="right" style:leader-style="dotted" style:leader-text="." style:position="6.3583in"/>
        </style:tab-stops>
      </style:paragraph-properties>
    </style:style>
    <style:style style:name="P15" style:parent-style-name="Verzeichnis3" style:family="paragraph">
      <style:paragraph-properties>
        <style:tab-stops>
          <style:tab-stop style:type="right" style:leader-style="dotted" style:leader-text="." style:position="6.1916in"/>
        </style:tab-stops>
      </style:paragraph-properties>
    </style:style>
    <style:style style:name="P16" style:parent-style-name="Verzeichnis3" style:family="paragraph">
      <style:paragraph-properties>
        <style:tab-stops>
          <style:tab-stop style:type="right" style:leader-style="dotted" style:leader-text="." style:position="6.1916in"/>
        </style:tab-stops>
      </style:paragraph-properties>
    </style:style>
    <style:style style:name="P17" style:parent-style-name="Verzeichnis3" style:family="paragraph">
      <style:paragraph-properties>
        <style:tab-stops>
          <style:tab-stop style:type="right" style:leader-style="dotted" style:leader-text="." style:position="6.1916in"/>
        </style:tab-stops>
      </style:paragraph-properties>
    </style:style>
    <style:style style:name="P18" style:parent-style-name="Verzeichnis2" style:family="paragraph">
      <style:paragraph-properties>
        <style:tab-stops>
          <style:tab-stop style:type="right" style:leader-style="dotted" style:leader-text="." style:position="6.3583in"/>
        </style:tab-stops>
      </style:paragraph-properties>
    </style:style>
    <style:style style:name="P19" style:parent-style-name="Verzeichnis3" style:family="paragraph">
      <style:paragraph-properties>
        <style:tab-stops>
          <style:tab-stop style:type="right" style:leader-style="dotted" style:leader-text="." style:position="6.1916in"/>
        </style:tab-stops>
      </style:paragraph-properties>
    </style:style>
    <style:style style:name="P20" style:parent-style-name="Verzeichnis1" style:family="paragraph">
      <style:paragraph-properties>
        <style:tab-stops>
          <style:tab-stop style:type="right" style:leader-style="dotted" style:leader-text="." style:position="6.525in"/>
        </style:tab-stops>
      </style:paragraph-properties>
    </style:style>
    <style:style style:name="P21" style:parent-style-name="Verzeichnis1" style:family="paragraph">
      <style:paragraph-properties>
        <style:tab-stops>
          <style:tab-stop style:type="right" style:leader-style="dotted" style:leader-text="." style:position="6.525in"/>
        </style:tab-stops>
      </style:paragraph-properties>
    </style:style>
    <style:style style:name="P22" style:parent-style-name="Verzeichnis1" style:family="paragraph">
      <style:paragraph-properties>
        <style:tab-stops>
          <style:tab-stop style:type="right" style:leader-style="dotted" style:leader-text="." style:position="6.525in"/>
        </style:tab-stops>
      </style:paragraph-properties>
    </style:style>
    <style:style style:name="P23" style:parent-style-name="Verzeichnis1" style:family="paragraph">
      <style:paragraph-properties>
        <style:tab-stops>
          <style:tab-stop style:type="right" style:leader-style="dotted" style:leader-text="." style:position="6.525in"/>
        </style:tab-stops>
      </style:paragraph-properties>
    </style:style>
    <style:style style:name="P24" style:parent-style-name="Verzeichnis1" style:family="paragraph">
      <style:paragraph-properties>
        <style:tab-stops>
          <style:tab-stop style:type="right" style:leader-style="dotted" style:leader-text="." style:position="6.525in"/>
        </style:tab-stops>
      </style:paragraph-properties>
    </style:style>
    <style:style style:name="P25" style:parent-style-name="Verzeichnis1" style:family="paragraph">
      <style:paragraph-properties>
        <style:tab-stops>
          <style:tab-stop style:type="right" style:leader-style="dotted" style:leader-text="." style:position="6.525in"/>
        </style:tab-stops>
      </style:paragraph-properties>
    </style:style>
    <style:style style:name="P26" style:parent-style-name="Verzeichnis1" style:family="paragraph">
      <style:paragraph-properties>
        <style:tab-stops>
          <style:tab-stop style:type="right" style:leader-style="dotted" style:leader-text="." style:position="6.525in"/>
        </style:tab-stops>
      </style:paragraph-properties>
    </style:style>
    <style:style style:name="P27" style:parent-style-name="Verzeichnis1" style:family="paragraph">
      <style:paragraph-properties>
        <style:tab-stops>
          <style:tab-stop style:type="right" style:leader-style="dotted" style:leader-text="." style:position="6.525in"/>
        </style:tab-stops>
      </style:paragraph-properties>
    </style:style>
    <style:style style:name="P28" style:parent-style-name="Verzeichnis1" style:family="paragraph">
      <style:paragraph-properties>
        <style:tab-stops>
          <style:tab-stop style:type="right" style:leader-style="dotted" style:leader-text="." style:position="6.525in"/>
        </style:tab-stops>
      </style:paragraph-properties>
    </style:style>
    <style:style style:name="P29" style:parent-style-name="Verzeichnis1" style:family="paragraph">
      <style:paragraph-properties>
        <style:tab-stops>
          <style:tab-stop style:type="right" style:leader-style="dotted" style:leader-text="." style:position="6.525in"/>
        </style:tab-stops>
      </style:paragraph-properties>
    </style:style>
    <style:style style:name="P30" style:parent-style-name="Verzeichnis1" style:family="paragraph">
      <style:paragraph-properties>
        <style:tab-stops>
          <style:tab-stop style:type="right" style:leader-style="dotted" style:leader-text="." style:position="6.525in"/>
        </style:tab-stops>
      </style:paragraph-properties>
    </style:style>
    <style:style style:name="P31" style:parent-style-name="Standard" style:family="paragraph">
      <style:text-properties style:font-name="Segoe UI Emoji" style:font-name-asian="Times New Roman" style:font-name-complex="Segoe UI Emoji" fo:font-weight="bold" style:font-weight-asian="bold" style:font-weight-complex="bold" fo:letter-spacing="-0.0069in" style:letter-kerning="true" fo:font-size="14pt" style:font-size-asian="14pt" style:font-size-complex="14pt"/>
    </style:style>
    <style:style style:name="T32" style:parent-style-name="Absatz-Standardschriftart" style:family="text">
      <style:text-properties style:font-name="Segoe UI Emoji" style:font-name-asian="Times New Roman" style:font-name-complex="Segoe UI Emoji" fo:font-weight="bold" style:font-weight-asian="bold" style:font-weight-complex="bold" fo:letter-spacing="-0.0069in" style:letter-kerning="true" fo:font-size="14pt" style:font-size-asian="14pt" style:font-size-complex="14pt"/>
    </style:style>
    <style:style style:name="T33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34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35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36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37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38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39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40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1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42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43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44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45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46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47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48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49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50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51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52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53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54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55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56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57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58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59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60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61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62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63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64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65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66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67" style:parent-style-name="Standard" style:family="paragraph">
      <style:text-properties style:font-name="Aptos Display" style:font-name-asian="Times New Roman" style:font-name-complex="Times New Roman" fo:letter-spacing="-0.0069in" style:letter-kerning="true" fo:font-size="13pt" style:font-size-asian="13pt" style:font-size-complex="13pt"/>
    </style:style>
    <style:style style:name="T68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3pt" style:font-size-asian="13pt" style:font-size-complex="13pt"/>
    </style:style>
    <style:style style:name="T69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3pt" style:font-size-asian="13pt" style:font-size-complex="13pt"/>
    </style:style>
    <style:style style:name="P70" style:parent-style-name="Standard" style:family="paragraph">
      <style:text-properties style:font-name="Aptos Display" style:font-name-asian="Times New Roman" style:font-name-complex="Times New Roman" fo:letter-spacing="-0.0069in" style:letter-kerning="true" fo:font-size="13pt" style:font-size-asian="13pt" style:font-size-complex="13pt"/>
    </style:style>
    <style:style style:name="P71" style:parent-style-name="Standard" style:family="paragraph">
      <style:text-properties style:font-name="Aptos Display" style:font-name-asian="Times New Roman" style:font-name-complex="Times New Roman" fo:letter-spacing="-0.0069in" style:letter-kerning="true" fo:font-size="13pt" style:font-size-asian="13pt" style:font-size-complex="13pt"/>
    </style:style>
    <style:style style:name="P72" style:parent-style-name="Standard" style:list-style-name="LFO1" style:family="paragraph">
      <style:text-properties style:font-name="Aptos Display" style:font-name-asian="Times New Roman" style:font-name-complex="Times New Roman" fo:letter-spacing="-0.0069in" style:letter-kerning="true" fo:font-size="13pt" style:font-size-asian="13pt" style:font-size-complex="13pt"/>
    </style:style>
    <style:style style:name="T73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3pt" style:font-size-asian="13pt" style:font-size-complex="13pt"/>
    </style:style>
    <style:style style:name="T74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3pt" style:font-size-asian="13pt" style:font-size-complex="13pt"/>
    </style:style>
    <style:style style:name="T75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3pt" style:font-size-asian="13pt" style:font-size-complex="13pt"/>
    </style:style>
    <style:style style:name="P76" style:parent-style-name="Standard" style:family="paragraph">
      <style:text-properties style:font-name="Aptos Display" style:font-name-asian="Times New Roman" style:font-name-complex="Times New Roman" fo:letter-spacing="-0.0069in" style:letter-kerning="true" fo:font-size="13pt" style:font-size-asian="13pt" style:font-size-complex="13pt"/>
    </style:style>
    <style:style style:name="P77" style:parent-style-name="Standard" style:list-style-name="LFO2" style:family="paragraph">
      <style:text-properties style:font-name="Aptos Display" style:font-name-asian="Times New Roman" style:font-name-complex="Times New Roman" fo:letter-spacing="-0.0069in" style:letter-kerning="true" fo:font-size="13pt" style:font-size-asian="13pt" style:font-size-complex="13pt"/>
    </style:style>
    <style:style style:name="T78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3pt" style:font-size-asian="13pt" style:font-size-complex="13pt"/>
    </style:style>
    <style:style style:name="T79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3pt" style:font-size-asian="13pt" style:font-size-complex="13pt"/>
    </style:style>
    <style:style style:name="T80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3pt" style:font-size-asian="13pt" style:font-size-complex="13pt"/>
    </style:style>
    <style:style style:name="P81" style:parent-style-name="Standard" style:family="paragraph">
      <style:text-properties style:font-name="Aptos Display" style:font-name-asian="Times New Roman" style:font-name-complex="Times New Roman" fo:letter-spacing="-0.0069in" style:letter-kerning="true" fo:font-size="13pt" style:font-size-asian="13pt" style:font-size-complex="13pt"/>
    </style:style>
    <style:style style:name="P82" style:parent-style-name="Standard" style:list-style-name="LFO3" style:family="paragraph">
      <style:text-properties style:font-name="Aptos Display" style:font-name-asian="Times New Roman" style:font-name-complex="Times New Roman" fo:letter-spacing="-0.0069in" style:letter-kerning="true" fo:font-size="13pt" style:font-size-asian="13pt" style:font-size-complex="13pt"/>
    </style:style>
    <style:style style:name="T83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3pt" style:font-size-asian="13pt" style:font-size-complex="13pt"/>
    </style:style>
    <style:style style:name="T84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3pt" style:font-size-asian="13pt" style:font-size-complex="13pt"/>
    </style:style>
    <style:style style:name="T85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3pt" style:font-size-asian="13pt" style:font-size-complex="13pt"/>
    </style:style>
    <style:style style:name="P86" style:parent-style-name="Standard" style:family="paragraph">
      <style:text-properties style:font-name="Aptos Display" style:font-name-asian="Times New Roman" style:font-name-complex="Times New Roman" fo:letter-spacing="-0.0069in" style:letter-kerning="true" fo:font-size="13pt" style:font-size-asian="13pt" style:font-size-complex="13pt"/>
    </style:style>
    <style:style style:name="P87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88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89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90" style:parent-style-name="Absatz-Standardschriftart" style:family="text">
      <style:text-properties style:font-name="Aptos Display" style:font-name-asian="Times New Roman" style:font-name-complex="Times New Roman" fo:font-style="italic" style:font-style-asian="italic" style:font-style-complex="italic" fo:letter-spacing="-0.0069in" style:letter-kerning="true" fo:font-size="14pt" style:font-size-asian="14pt" style:font-size-complex="14pt"/>
    </style:style>
    <style:style style:name="T91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92" style:parent-style-name="Standard" style:list-style-name="LFO4" style:family="paragraph"/>
    <style:style style:name="T93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94" style:parent-style-name="Standard" style:list-style-name="LFO4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95" style:parent-style-name="Standard" style:list-style-name="LFO4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96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97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98" style:parent-style-name="Absatz-Standardschriftart" style:family="text">
      <style:text-properties style:font-name="Aptos Display" style:font-name-asian="Times New Roman" style:font-name-complex="Times New Roman" fo:font-style="italic" style:font-style-asian="italic" style:font-style-complex="italic" fo:letter-spacing="-0.0069in" style:letter-kerning="true" fo:font-size="14pt" style:font-size-asian="14pt" style:font-size-complex="14pt"/>
    </style:style>
    <style:style style:name="T99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100" style:parent-style-name="Standard" style:list-style-name="LFO6" style:family="paragraph"/>
    <style:style style:name="T101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102" style:parent-style-name="Standard" style:list-style-name="LFO5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103" style:parent-style-name="Standard" style:list-style-name="LFO5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104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105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106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107" style:parent-style-name="Absatz-Standardschriftart" style:family="text">
      <style:text-properties style:font-name="Aptos Display" style:font-name-asian="Times New Roman" style:font-name-complex="Times New Roman" fo:font-style="italic" style:font-style-asian="italic" style:font-style-complex="italic" fo:letter-spacing="-0.0069in" style:letter-kerning="true" fo:font-size="14pt" style:font-size-asian="14pt" style:font-size-complex="14pt"/>
    </style:style>
    <style:style style:name="T108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109" style:parent-style-name="Standard" style:list-style-name="LFO8" style:family="paragraph"/>
    <style:style style:name="T110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111" style:parent-style-name="Standard" style:list-style-name="LFO7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112" style:parent-style-name="Standard" style:list-style-name="LFO7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113" style:parent-style-name="Standard" style:list-style-name="LFO7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114" style:parent-style-name="Absatz-Standardschriftart" style:family="text">
      <style:text-properties style:font-name="Aptos Display" style:font-name-asian="Times New Roman" style:font-name-complex="Times New Roman" fo:font-style="italic" style:font-style-asian="italic" style:font-style-complex="italic" fo:letter-spacing="-0.0069in" style:letter-kerning="true" fo:font-size="14pt" style:font-size-asian="14pt" style:font-size-complex="14pt"/>
    </style:style>
    <style:style style:name="T115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116" style:parent-style-name="Standard" style:list-style-name="LFO10" style:family="paragraph"/>
    <style:style style:name="T117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118" style:parent-style-name="Standard" style:list-style-name="LFO9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119" style:parent-style-name="Standard" style:list-style-name="LFO9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120" style:parent-style-name="Absatz-Standardschriftart" style:family="text">
      <style:text-properties style:font-name="Aptos Display" style:font-name-asian="Times New Roman" style:font-name-complex="Times New Roman" fo:font-style="italic" style:font-style-asian="italic" style:font-style-complex="italic" fo:letter-spacing="-0.0069in" style:letter-kerning="true" fo:font-size="14pt" style:font-size-asian="14pt" style:font-size-complex="14pt"/>
    </style:style>
    <style:style style:name="T121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122" style:parent-style-name="Standard" style:list-style-name="LFO12" style:family="paragraph"/>
    <style:style style:name="T123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124" style:parent-style-name="Standard" style:list-style-name="LFO11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125" style:parent-style-name="Standard" style:list-style-name="LFO11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126" style:parent-style-name="Standard" style:list-style-name="LFO14" style:family="paragraph"/>
    <style:style style:name="T127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128" style:parent-style-name="Standard" style:list-style-name="LFO13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129" style:parent-style-name="Standard" style:list-style-name="LFO13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130" style:parent-style-name="Standard" style:list-style-name="LFO16" style:family="paragraph"/>
    <style:style style:name="T131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132" style:parent-style-name="Standard" style:list-style-name="LFO15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133" style:parent-style-name="Standard" style:list-style-name="LFO18" style:family="paragraph"/>
    <style:style style:name="T134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135" style:parent-style-name="Standard" style:list-style-name="LFO17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136" style:parent-style-name="Standard" style:list-style-name="LFO17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137" style:parent-style-name="Standard" style:list-style-name="LFO20" style:family="paragraph"/>
    <style:style style:name="T138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139" style:parent-style-name="Standard" style:list-style-name="LFO19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140" style:parent-style-name="Standard" style:list-style-name="LFO19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141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ableColumn143" style:family="table-column">
      <style:table-column-properties style:column-width="2.0895in"/>
    </style:style>
    <style:style style:name="TableColumn144" style:family="table-column">
      <style:table-column-properties style:column-width="3.934in"/>
    </style:style>
    <style:style style:name="TableColumn145" style:family="table-column">
      <style:table-column-properties style:column-width="0.5013in"/>
    </style:style>
    <style:style style:name="Table142" style:family="table">
      <style:table-properties style:width="6.525in" fo:margin-left="0in" table:align="left"/>
    </style:style>
    <style:style style:name="TableRow146" style:family="table-row">
      <style:table-row-properties style:min-row-height="0.0395in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Row153" style:family="table-row">
      <style:table-row-properties style:min-row-height="0.0395in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Row160" style:family="table-row">
      <style:table-row-properties style:min-row-height="0.0395in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Row167" style:family="table-row">
      <style:table-row-properties style:min-row-height="0.0395in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Row174" style:family="table-row">
      <style:table-row-properties style:min-row-height="0.0395in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Row181" style:family="table-row">
      <style:table-row-properties style:min-row-height="0.0395in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Row188" style:family="table-row">
      <style:table-row-properties style:min-row-height="0.0395in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Row195" style:family="table-row">
      <style:table-row-properties style:min-row-height="0.0395in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Row202" style:family="table-row">
      <style:table-row-properties style:min-row-height="0.0395in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Row209" style:family="table-row">
      <style:table-row-properties style:min-row-height="0.0395in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Row216" style:family="table-row">
      <style:table-row-properties style:min-row-height="0.0395in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Row223" style:family="table-row">
      <style:table-row-properties style:min-row-height="0.0395in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Row230" style:family="table-row">
      <style:table-row-properties style:min-row-height="0.0395in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Row237" style:family="table-row">
      <style:table-row-properties style:min-row-height="0.0395in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244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245" style:parent-style-name="Standard" style:family="paragraph">
      <style:paragraph-properties fo:line-height="100%"/>
    </style:style>
    <style:style style:name="T246" style:parent-style-name="Absatz-Standardschriftart" style:family="text">
      <style:text-properties style:font-name="Segoe UI Emoji" style:font-name-complex="Segoe UI Emoji"/>
    </style:style>
    <style:style style:name="P247" style:parent-style-name="Standard" style:family="paragraph">
      <style:paragraph-properties fo:line-height="100%"/>
    </style:style>
    <style:style style:name="P248" style:parent-style-name="Standard" style:family="paragraph">
      <style:paragraph-properties fo:line-height="100%"/>
    </style:style>
    <style:style style:name="T249" style:parent-style-name="Absatz-Standardschriftart" style:family="text">
      <style:text-properties style:font-name="Segoe UI Emoji" style:font-name-complex="Segoe UI Emoji"/>
    </style:style>
    <style:style style:name="P250" style:parent-style-name="Standard" style:family="paragraph">
      <style:paragraph-properties fo:line-height="100%"/>
    </style:style>
    <style:style style:name="P251" style:parent-style-name="Standard" style:family="paragraph">
      <style:paragraph-properties fo:line-height="100%"/>
    </style:style>
    <style:style style:name="T252" style:parent-style-name="Absatz-Standardschriftart" style:family="text">
      <style:text-properties style:font-name="Segoe UI Emoji" style:font-name-complex="Segoe UI Emoji"/>
    </style:style>
    <style:style style:name="P253" style:parent-style-name="Standard" style:family="paragraph">
      <style:paragraph-properties fo:line-height="100%"/>
    </style:style>
    <style:style style:name="T254" style:parent-style-name="Absatz-Standardschriftart" style:family="text">
      <style:text-properties style:font-name="Arial" style:font-name-complex="Arial"/>
    </style:style>
    <style:style style:name="T255" style:parent-style-name="Absatz-Standardschriftart" style:family="text">
      <style:text-properties style:font-name="Aptos Display" style:font-name-complex="Aptos Display"/>
    </style:style>
    <style:style style:name="P256" style:parent-style-name="Standard" style:family="paragraph">
      <style:paragraph-properties fo:line-height="100%"/>
    </style:style>
    <style:style style:name="T257" style:parent-style-name="Absatz-Standardschriftart" style:family="text">
      <style:text-properties style:font-name="Segoe UI Emoji" style:font-name-complex="Segoe UI Emoji"/>
    </style:style>
    <style:style style:name="P258" style:parent-style-name="Standard" style:family="paragraph">
      <style:paragraph-properties fo:line-height="100%"/>
    </style:style>
    <style:style style:name="P259" style:parent-style-name="Standard" style:family="paragraph">
      <style:paragraph-properties fo:line-height="100%"/>
    </style:style>
    <style:style style:name="T260" style:parent-style-name="Absatz-Standardschriftart" style:family="text">
      <style:text-properties style:font-name="Segoe UI Emoji" style:font-name-complex="Segoe UI Emoji"/>
    </style:style>
    <style:style style:name="P261" style:parent-style-name="Standard" style:family="paragraph">
      <style:paragraph-properties fo:line-height="100%"/>
    </style:style>
    <style:style style:name="T262" style:parent-style-name="Absatz-Standardschriftart" style:family="text">
      <style:text-properties style:font-name="Arial" style:font-name-complex="Arial"/>
    </style:style>
    <style:style style:name="T263" style:parent-style-name="Absatz-Standardschriftart" style:family="text">
      <style:text-properties style:font-name="Aptos Display" style:font-name-complex="Aptos Display"/>
    </style:style>
    <style:style style:name="P264" style:parent-style-name="Standard" style:family="paragraph">
      <style:paragraph-properties fo:line-height="100%"/>
    </style:style>
    <style:style style:name="T265" style:parent-style-name="Absatz-Standardschriftart" style:family="text">
      <style:text-properties style:font-name="Segoe UI Emoji" style:font-name-complex="Segoe UI Emoji"/>
    </style:style>
    <style:style style:name="P266" style:parent-style-name="Standard" style:family="paragraph">
      <style:paragraph-properties fo:line-height="100%"/>
    </style:style>
    <style:style style:name="P267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268" style:parent-style-name="Standard" style:list-style-name="LFO21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269" style:parent-style-name="Standard" style:list-style-name="LFO21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270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271" style:parent-style-name="Standard" style:list-style-name="LFO22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272" style:parent-style-name="Standard" style:list-style-name="LFO22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273" style:parent-style-name="Standard" style:list-style-name="LFO22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274" style:parent-style-name="Absatz-Standardschriftart" style:family="text">
      <style:text-properties style:font-name="Segoe UI Emoji" style:font-name-asian="Times New Roman" style:font-name-complex="Segoe UI Emoji" fo:font-weight="bold" style:font-weight-asian="bold" style:font-weight-complex="bold" fo:letter-spacing="-0.0069in" style:letter-kerning="true" fo:font-size="14pt" style:font-size-asian="14pt" style:font-size-complex="14pt"/>
    </style:style>
    <style:style style:name="T275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276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277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278" style:parent-style-name="Standard" style:list-style-name="LFO38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279" style:parent-style-name="Standard" style:list-style-name="LFO38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280" style:parent-style-name="Absatz-Standardschriftart" style:family="text">
      <style:text-properties style:font-name="Segoe UI Emoji" style:font-name-asian="Times New Roman" style:font-name-complex="Segoe UI Emoji" fo:font-weight="bold" style:font-weight-asian="bold" style:font-weight-complex="bold" fo:letter-spacing="-0.0069in" style:letter-kerning="true" fo:font-size="14pt" style:font-size-asian="14pt" style:font-size-complex="14pt"/>
    </style:style>
    <style:style style:name="T281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282" style:parent-style-name="Standard" style:list-style-name="LFO39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283" style:parent-style-name="Standard" style:list-style-name="LFO39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284" style:parent-style-name="Standard" style:list-style-name="LFO39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285" style:parent-style-name="Standard" style:list-style-name="LFO39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286" style:parent-style-name="Absatz-Standardschriftart" style:family="text">
      <style:text-properties style:font-name="Segoe UI Emoji" style:font-name-asian="Times New Roman" style:font-name-complex="Segoe UI Emoji" fo:font-weight="bold" style:font-weight-asian="bold" style:font-weight-complex="bold" fo:letter-spacing="-0.0069in" style:letter-kerning="true" fo:font-size="14pt" style:font-size-asian="14pt" style:font-size-complex="14pt"/>
    </style:style>
    <style:style style:name="T287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288" style:parent-style-name="Standard" style:list-style-name="LFO40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289" style:parent-style-name="Standard" style:list-style-name="LFO40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290" style:parent-style-name="Absatz-Standardschriftart" style:family="text">
      <style:text-properties style:font-name="Segoe UI Emoji" style:font-name-asian="Times New Roman" style:font-name-complex="Segoe UI Emoji" fo:font-weight="bold" style:font-weight-asian="bold" style:font-weight-complex="bold" fo:letter-spacing="-0.0069in" style:letter-kerning="true" fo:font-size="14pt" style:font-size-asian="14pt" style:font-size-complex="14pt"/>
    </style:style>
    <style:style style:name="T291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292" style:parent-style-name="Standard" style:list-style-name="LFO41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293" style:parent-style-name="Standard" style:list-style-name="LFO41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294" style:parent-style-name="Absatz-Standardschriftart" style:family="text">
      <style:text-properties style:font-name="Segoe UI Emoji" style:font-name-asian="Times New Roman" style:font-name-complex="Segoe UI Emoji" fo:font-weight="bold" style:font-weight-asian="bold" style:font-weight-complex="bold" fo:letter-spacing="-0.0069in" style:letter-kerning="true" fo:font-size="14pt" style:font-size-asian="14pt" style:font-size-complex="14pt"/>
    </style:style>
    <style:style style:name="T295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296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297" style:parent-style-name="Standard" style:list-style-name="LFO42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298" style:parent-style-name="Standard" style:list-style-name="LFO42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299" style:parent-style-name="Standard" style:list-style-name="LFO42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300" style:parent-style-name="Absatz-Standardschriftart" style:family="text">
      <style:text-properties style:font-name="Segoe UI Emoji" style:font-name-asian="Times New Roman" style:font-name-complex="Segoe UI Emoji" fo:font-weight="bold" style:font-weight-asian="bold" style:font-weight-complex="bold" fo:letter-spacing="-0.0069in" style:letter-kerning="true" fo:font-size="14pt" style:font-size-asian="14pt" style:font-size-complex="14pt"/>
    </style:style>
    <style:style style:name="T301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302" style:parent-style-name="Standard" style:list-style-name="LFO43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303" style:parent-style-name="Standard" style:list-style-name="LFO43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304" style:parent-style-name="Standard" style:list-style-name="LFO43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305" style:parent-style-name="Absatz-Standardschriftart" style:family="text">
      <style:text-properties style:font-name="Segoe UI Emoji" style:font-name-asian="Times New Roman" style:font-name-complex="Segoe UI Emoji" fo:font-weight="bold" style:font-weight-asian="bold" style:font-weight-complex="bold" fo:letter-spacing="-0.0069in" style:letter-kerning="true" fo:font-size="14pt" style:font-size-asian="14pt" style:font-size-complex="14pt"/>
    </style:style>
    <style:style style:name="T306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307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308" style:parent-style-name="Standard" style:list-style-name="LFO44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309" style:parent-style-name="Standard" style:list-style-name="LFO44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310" style:parent-style-name="Absatz-Standardschriftart" style:family="text">
      <style:text-properties style:font-name="Segoe UI Emoji" style:font-name-asian="Times New Roman" style:font-name-complex="Segoe UI Emoji" fo:font-weight="bold" style:font-weight-asian="bold" style:font-weight-complex="bold" fo:letter-spacing="-0.0069in" style:letter-kerning="true" fo:font-size="14pt" style:font-size-asian="14pt" style:font-size-complex="14pt"/>
    </style:style>
    <style:style style:name="T311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312" style:parent-style-name="Standard" style:list-style-name="LFO45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313" style:parent-style-name="Standard" style:list-style-name="LFO45" style:family="paragraph"/>
    <style:style style:name="T314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315" style:parent-style-name="Absatz-Standardschriftart" style:family="text">
      <style:text-properties style:font-name="Arial" style:font-name-asian="Times New Roman" style:font-name-complex="Arial" fo:letter-spacing="-0.0069in" style:letter-kerning="true" fo:font-size="14pt" style:font-size-asian="14pt" style:font-size-complex="14pt"/>
    </style:style>
    <style:style style:name="T316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317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318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319" style:parent-style-name="Standard" style:list-style-name="LFO23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320" style:parent-style-name="Standard" style:list-style-name="LFO23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321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322" style:parent-style-name="Standard" style:list-style-name="LFO24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323" style:parent-style-name="Standard" style:list-style-name="LFO24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324" style:parent-style-name="Standard" style:list-style-name="LFO24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325" style:parent-style-name="Standard" style:list-style-name="LFO24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326" style:parent-style-name="Standard" style:list-style-name="LFO24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327" style:parent-style-name="Standard" style:list-style-name="LFO25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328" style:parent-style-name="Standard" style:list-style-name="LFO25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329" style:parent-style-name="Standard" style:list-style-name="LFO25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330" style:parent-style-name="Standard" style:list-style-name="LFO25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331" style:parent-style-name="Standard" style:list-style-name="LFO25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332" style:parent-style-name="Standard" style:list-style-name="LFO25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333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ableColumn335" style:family="table-column">
      <style:table-column-properties style:column-width="0.8597in"/>
    </style:style>
    <style:style style:name="TableColumn336" style:family="table-column">
      <style:table-column-properties style:column-width="1.5479in"/>
    </style:style>
    <style:style style:name="TableColumn337" style:family="table-column">
      <style:table-column-properties style:column-width="3.6118in"/>
    </style:style>
    <style:style style:name="TableColumn338" style:family="table-column">
      <style:table-column-properties style:column-width="0.5125in"/>
    </style:style>
    <style:style style:name="Table334" style:family="table">
      <style:table-properties style:width="6.5319in" fo:margin-left="0in" table:align="left"/>
    </style:style>
    <style:style style:name="TableRow339" style:family="table-row">
      <style:table-row-properties/>
    </style:style>
    <style:style style:name="TableCell3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41" style:parent-style-name="Hyperlink" style:family="text">
      <style:text-properties fo:font-weight="bold" style:font-weight-asian="bold" style:font-weight-complex="bold"/>
    </style:style>
    <style:style style:name="TableCell3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43" style:parent-style-name="Hyperlink" style:family="text">
      <style:text-properties fo:font-weight="bold" style:font-weight-asian="bold" style:font-weight-complex="bold"/>
    </style:style>
    <style:style style:name="TableCell3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45" style:parent-style-name="Hyperlink" style:family="text">
      <style:text-properties fo:font-weight="bold" style:font-weight-asian="bold" style:font-weight-complex="bold"/>
    </style:style>
    <style:style style:name="TableCell3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47" style:parent-style-name="Hyperlink" style:family="text">
      <style:text-properties fo:font-weight="bold" style:font-weight-asian="bold" style:font-weight-complex="bold"/>
    </style:style>
    <style:style style:name="TableRow348" style:family="table-row">
      <style:table-row-properties/>
    </style:style>
    <style:style style:name="TableCell3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53" style:family="table-row">
      <style:table-row-properties/>
    </style:style>
    <style:style style:name="TableCell3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58" style:family="table-row">
      <style:table-row-properties/>
    </style:style>
    <style:style style:name="TableCell3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63" style:family="table-row">
      <style:table-row-properties/>
    </style:style>
    <style:style style:name="TableCell3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68" style:family="table-row">
      <style:table-row-properties/>
    </style:style>
    <style:style style:name="TableCell3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73" style:family="table-row">
      <style:table-row-properties/>
    </style:style>
    <style:style style:name="TableCell3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78" style:family="table-row">
      <style:table-row-properties/>
    </style:style>
    <style:style style:name="TableCell3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83" style:family="table-row">
      <style:table-row-properties/>
    </style:style>
    <style:style style:name="TableCell3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88" style:family="table-row">
      <style:table-row-properties/>
    </style:style>
    <style:style style:name="TableCell3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93" style:family="table-row">
      <style:table-row-properties/>
    </style:style>
    <style:style style:name="TableCell3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98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399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400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401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402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403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404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05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06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07" style:parent-style-name="Listenabsatz" style:list-style-name="LFO24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08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09" style:parent-style-name="Listenabsatz" style:list-style-name="LFO24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10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11" style:parent-style-name="Standard" style:list-style-name="LFO26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12" style:parent-style-name="Standard" style:list-style-name="LFO26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13" style:parent-style-name="Standard" style:list-style-name="LFO26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14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415" style:parent-style-name="Standard" style:list-style-name="LFO27" style:family="paragraph"/>
    <style:style style:name="T416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417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418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419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420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21" style:parent-style-name="Standard" style:list-style-name="LFO27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22" style:parent-style-name="Standard" style:list-style-name="LFO27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23" style:parent-style-name="Standard" style:list-style-name="LFO27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24" style:parent-style-name="Standard" style:list-style-name="LFO27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25" style:parent-style-name="Standard" style:list-style-name="LFO27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26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427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428" style:parent-style-name="Standard" style:list-style-name="LFO28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29" style:parent-style-name="Standard" style:list-style-name="LFO28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30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431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32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33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34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35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36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37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438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39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40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441" style:parent-style-name="Standard" style:list-style-name="LFO29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42" style:parent-style-name="Standard" style:list-style-name="LFO29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43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444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445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46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47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48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449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50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51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52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453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54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55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456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57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58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459" style:parent-style-name="Standard" style:list-style-name="LFO30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60" style:parent-style-name="Standard" style:list-style-name="LFO30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61" style:parent-style-name="Standard" style:list-style-name="LFO30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62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463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464" style:parent-style-name="Standard" style:list-style-name="LFO31" style:family="paragraph"/>
    <style:style style:name="T465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466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467" style:parent-style-name="Standard" style:list-style-name="LFO31" style:family="paragraph"/>
    <style:style style:name="T468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469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470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471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72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73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74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475" style:parent-style-name="Standard" style:list-style-name="LFO32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76" style:parent-style-name="Standard" style:list-style-name="LFO32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77" style:parent-style-name="Standard" style:list-style-name="LFO32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78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79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80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481" style:parent-style-name="Absatz-Standardschriftart" style:family="text">
      <style:text-properties style:font-name="Aptos Display" style:font-name-asian="Times New Roman" style:font-name-complex="Times New Roman" fo:font-style="italic" style:font-style-asian="italic" style:font-style-complex="italic" fo:letter-spacing="-0.0069in" style:letter-kerning="true" fo:font-size="14pt" style:font-size-asian="14pt" style:font-size-complex="14pt"/>
    </style:style>
    <style:style style:name="P482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483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84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85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86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487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88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89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490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91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92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493" style:parent-style-name="Standard" style:list-style-name="LFO33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94" style:parent-style-name="Standard" style:list-style-name="LFO33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95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496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497" style:parent-style-name="Standard" style:list-style-name="LFO34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98" style:parent-style-name="Standard" style:list-style-name="LFO34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99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500" style:parent-style-name="Standard" style:list-style-name="LFO35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501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502" style:parent-style-name="Standard" style:list-style-name="LFO36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503" style:parent-style-name="Standard" style:list-style-name="LFO36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504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505" style:parent-style-name="Standard" style:list-style-name="LFO37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506" style:parent-style-name="Standard" style:list-style-name="LFO37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507" style:parent-style-name="Standard" style:list-style-name="LFO37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508" style:parent-style-name="Standard" style:list-style-name="LFO37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509" style:parent-style-name="Standard" style:list-style-name="LFO37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510" style:parent-style-name="Standard" style:list-style-name="LFO37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511" style:parent-style-name="Standard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Projekt: Multi User Messaging System</text:p>
      <text:p text:style-name="P2">Modul: 223</text:p>
      <text:p text:style-name="P3">Ersteller: Alen<text:span text:style-name="T4"><text:line-break/></text:span><text:span text:style-name="T5">Datum: 19.05.2026</text:span></text:p>
      <text:soft-page-break/>
      <text:p text:style-name="P6"><text:line-break/></text:p>
      <text:p text:style-name="Inhaltsverzeichnisüberschrift">Inhaltsverzechnis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Verzeichnis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Verzeichnis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Verzeichnis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"><text:a xlink:href="#_Toc230084820" office:target-frame-name="_top" xlink:show="replace"><text:span text:style-name="Hyperlink">1. Einleitung</text:span><text:tab/>3</text:a></text:p>
          <text:p text:style-name="P8"><text:a xlink:href="#_Toc230084821" office:target-frame-name="_top" xlink:show="replace"><text:span text:style-name="Hyperlink">2. Systemrollen</text:span><text:tab/>3</text:a></text:p>
          <text:p text:style-name="P9"><text:a xlink:href="#_Toc230084822" office:target-frame-name="_top" xlink:show="replace"><text:span text:style-name="Hyperlink">3. User Stories mit Akzeptanzkriterien</text:span><text:tab/>4</text:a></text:p>
          <text:p text:style-name="P10"><text:a xlink:href="#_Toc230084823" office:target-frame-name="_top" xlink:show="replace"><text:span text:style-name="Hyperlink">User</text:span><text:tab/>4</text:a></text:p>
          <text:p text:style-name="P11"><text:a xlink:href="#_Toc230084824" office:target-frame-name="_top" xlink:show="replace"><text:span text:style-name="Hyperlink">Gruppenchat</text:span><text:span text:style-name="Hyperlink">‑Member</text:span><text:tab/>5</text:a></text:p>
          <text:p text:style-name="P12"><text:a xlink:href="#_Toc230084825" office:target-frame-name="_top" xlink:show="replace"><text:span text:style-name="Hyperlink">Nachrichten senden</text:span><text:tab/>5</text:a></text:p>
          <text:p text:style-name="P13"><text:a xlink:href="#_Toc230084826" office:target-frame-name="_top" xlink:show="replace"><text:span text:style-name="Hyperlink">Nachrichten lesen</text:span><text:tab/>5</text:a></text:p>
          <text:p text:style-name="P14"><text:a xlink:href="#_Toc230084827" office:target-frame-name="_top" xlink:show="replace"><text:span text:style-name="Hyperlink">Gruppenchat</text:span><text:span text:style-name="Hyperlink">‑Owner</text:span><text:tab/>5</text:a></text:p>
          <text:p text:style-name="P15"><text:a xlink:href="#_Toc230084828" office:target-frame-name="_top" xlink:show="replace"><text:span text:style-name="Hyperlink">Join</text:span><text:span text:style-name="Hyperlink">‑Requests annehmen</text:span><text:tab/>5</text:a></text:p>
          <text:p text:style-name="P16"><text:a xlink:href="#_Toc230084829" office:target-frame-name="_top" xlink:show="replace"><text:span text:style-name="Hyperlink">Join</text:span><text:span text:style-name="Hyperlink">‑Requests ablehnen</text:span><text:tab/>5</text:a></text:p>
          <text:p text:style-name="P17"><text:a xlink:href="#_Toc230084830" office:target-frame-name="_top" xlink:show="replace"><text:span text:style-name="Hyperlink">Mitglieder entfernen</text:span><text:tab/>5</text:a></text:p>
          <text:p text:style-name="P18"><text:a xlink:href="#_Toc230084831" office:target-frame-name="_top" xlink:show="replace"><text:span text:style-name="Hyperlink">Admin</text:span><text:tab/>6</text:a></text:p>
          <text:p text:style-name="P19"><text:a xlink:href="#_Toc230084832" office:target-frame-name="_top" xlink:show="replace"><text:span text:style-name="Hyperlink">Gruppenchats löschen</text:span><text:tab/>6</text:a></text:p>
          <text:p text:style-name="P20"><text:a xlink:href="#_Toc230084833" office:target-frame-name="_top" xlink:show="replace"><text:span text:style-name="Hyperlink">4. Arbeitsplan</text:span><text:tab/>6</text:a></text:p>
          <text:p text:style-name="P21"><text:a xlink:href="#_Toc230084834" office:target-frame-name="_top" xlink:show="replace"><text:span text:style-name="Hyperlink">5. Backend</text:span><text:span text:style-name="Hyperlink">‑Architektur</text:span><text:tab/>7</text:a></text:p>
          <text:p text:style-name="P22"><text:a xlink:href="#_Toc230084835" office:target-frame-name="_top" xlink:show="replace"><text:span text:style-name="Hyperlink">6. Backend</text:span><text:span text:style-name="Hyperlink">‑Tests</text:span><text:tab/>8</text:a></text:p>
          <text:p text:style-name="P23"><text:a xlink:href="#_Toc230084836" office:target-frame-name="_top" xlink:show="replace"><text:span text:style-name="Hyperlink">7. Frontend</text:span><text:span text:style-name="Hyperlink">‑Architektur</text:span><text:tab/>8</text:a></text:p>
          <text:p text:style-name="P24"><text:a xlink:href="#_Toc230084837" office:target-frame-name="_top" xlink:show="replace"><text:span text:style-name="Hyperlink">8. Frontend</text:span><text:span text:style-name="Hyperlink">‑Tests</text:span><text:tab/>8</text:a></text:p>
          <text:p text:style-name="P25"><text:a xlink:href="#_Toc230084838" office:target-frame-name="_top" xlink:show="replace"><text:span text:style-name="Hyperlink">9. JWT</text:span><text:span text:style-name="Hyperlink">‑Authentifizierung</text:span><text:tab/>8</text:a></text:p>
          <text:p text:style-name="P26"><text:a xlink:href="#_Toc230084839" office:target-frame-name="_top" xlink:show="replace"><text:span text:style-name="Hyperlink">10. Sicherheitskonzept</text:span><text:tab/>9</text:a></text:p>
          <text:p text:style-name="P27"><text:a xlink:href="#_Toc230084840" office:target-frame-name="_top" xlink:show="replace"><text:span text:style-name="Hyperlink">11. Arbeitsjournal</text:span><text:tab/>9</text:a></text:p>
          <text:p text:style-name="P28"><text:a xlink:href="#_Toc230084841" office:target-frame-name="_top" xlink:show="replace"><text:span text:style-name="Hyperlink">12. Soll</text:span><text:span text:style-name="Hyperlink">‑Ist Vergleich</text:span><text:tab/>10</text:a></text:p>
          <text:p text:style-name="P29"><text:a xlink:href="#_Toc230084842" office:target-frame-name="_top" xlink:show="replace"><text:span text:style-name="Hyperlink">13. Problemanalyse</text:span><text:tab/>10</text:a></text:p>
          <text:p text:style-name="P30"><text:a xlink:href="#_Toc230084843" office:target-frame-name="_top" xlink:show="replace"><text:span text:style-name="Hyperlink">14. Deployment</text:span><text:span text:style-name="Hyperlink">‑Anleitung</text:span><text:tab/>11</text:a></text:p>
        </text:index-body>
      </text:table-of-content>
      <text:p text:style-name="Standard"/>
      <text:p text:style-name="P31"/>
      <text:soft-page-break/>
      <text:p text:style-name="Standard"><text:span text:style-name="T32">📘</text:span><text:span text:style-name="T33"><text:s/>Projektdokumentation – Multi</text:span><text:span text:style-name="T34">‑User Messaging System</text:span></text:p>
      <text:h text:style-name="Überschrift1" text:outline-level="1"><text:bookmark-start text:name="_Toc230084820"/>1. Einleitung<text:bookmark-end text:name="_Toc230084820"/></text:h>
      <text:p text:style-name="Standard"><text:span text:style-name="T35">Das Projekt ist ein webbasiertes<text:s/></text:span><text:span text:style-name="T36">Multi</text:span><text:span text:style-name="T37">‑User Messaging System</text:span><text:span text:style-name="T38">, in dem Benutzer in<text:s/></text:span><text:span text:style-name="T39">öffentlichen Gruppen</text:span><text:span text:style-name="T40"><text:s/>miteinander kommunizieren können.</text:span></text:p>
      <text:p text:style-name="P41">Jeder User kann Nachrichten schreiben, Gruppen beitreten, Gruppen erstellen und zwischen Gruppen wechseln.</text:p>
      <text:p text:style-name="Standard"><text:span text:style-name="T42">Das System funktioniert ähnlich wie Social</text:span><text:span text:style-name="T43">‑Media</text:span><text:span text:style-name="T44">‑Gruppen, jedoch mit dem Fokus auf<text:s/></text:span><text:span text:style-name="T45">öffentliche Sichtbarkeit</text:span><text:span text:style-name="T46"><text:s/>und<text:s/></text:span><text:span text:style-name="T47">Join</text:span><text:span text:style-name="T48">‑Requests</text:span><text:span text:style-name="T49">.</text:span></text:p>
      <text:p text:style-name="Standard"><text:span text:style-name="T50">Ziel des Projekts ist die Entwicklung eines vollständigen Full</text:span><text:span text:style-name="T51">‑Stack</text:span><text:span text:style-name="T52">‑Systems mit<text:s/></text:span><text:span text:style-name="T53">Spring Boot Backend</text:span><text:span text:style-name="T54">,<text:s/></text:span><text:span text:style-name="T55">React Frontend</text:span><text:span text:style-name="T56">,<text:s/></text:span><text:span text:style-name="T57">JWT</text:span><text:span text:style-name="T58">‑Authentifizierung</text:span><text:span text:style-name="T59">,<text:s/></text:span><text:span text:style-name="T60">Transaktionen</text:span><text:span text:style-name="T61">,<text:s/></text:span><text:span text:style-name="T62">automatisierten Tests</text:span><text:span text:style-name="T63"><text:s/>und<text:s/></text:span><text:span text:style-name="T64">Deployment</text:span><text:span text:style-name="T65">‑Fähigkeit</text:span><text:span text:style-name="T66">.</text:span></text:p>
      <text:h text:style-name="Überschrift1" text:outline-level="1"><text:bookmark-start text:name="_Toc230084821"/>2. Systemrollen<text:bookmark-end text:name="_Toc230084821"/></text:h>
      <text:p text:style-name="P67">Im System existieren vier Rollen:</text:p>
      <text:p text:style-name="Standard"><text:span text:style-name="T68">User</text:span><text:span text:style-name="T69">  </text:span></text:p>
      <text:p text:style-name="P70">– sieht alle Gruppenchats</text:p>
      <text:p text:style-name="P71">– sieht Gruppentitel</text:p>
      <text:list text:style-name="LFO1" text:continue-numbering="true">
        <text:list-item>
          <text:p text:style-name="P72">– kann Join‑Requests senden</text:p>
        </text:list-item>
      </text:list>
      <text:p text:style-name="Standard"><text:span text:style-name="T73">Gruppenchat</text:span><text:span text:style-name="T74">‑Member</text:span><text:span text:style-name="T75">  </text:span></text:p>
      <text:p text:style-name="P76">– kann Nachrichten senden</text:p>
      <text:list text:style-name="LFO2" text:continue-numbering="true">
        <text:list-item>
          <text:p text:style-name="P77">– sieht alle Nachrichten</text:p>
        </text:list-item>
      </text:list>
      <text:p text:style-name="Standard"><text:span text:style-name="T78">Gruppenchat</text:span><text:span text:style-name="T79">‑Owner</text:span><text:span text:style-name="T80">  </text:span></text:p>
      <text:p text:style-name="P81">– kann Join‑Requests annehmen/ablehnen</text:p>
      <text:list text:style-name="LFO3" text:continue-numbering="true">
        <text:list-item>
          <text:p text:style-name="P82">– kann Mitglieder entfernen</text:p>
        </text:list-item>
      </text:list>
      <text:p text:style-name="Standard"><text:span text:style-name="T83">Admin</text:span><text:span text:style-name="T84">  </text:span><text:span text:style-name="T85">(geplant aber nicht implementiert</text:span></text:p>
      <text:p text:style-name="P86">– kann Gruppenchats löschen</text:p>
      <text:h text:style-name="Überschrift1" text:outline-level="1"><text:bookmark-start text:name="_Toc230084822"/><text:soft-page-break/>3. User Stories mit Akzeptanzkriterien<text:bookmark-end text:name="_Toc230084822"/></text:h>
      <text:p text:style-name="P87">Basierend auf deinen vorhandenen User Stories habe ich sie vollständig ergänzt und mit Akzeptanzkriterien versehen.</text:p>
      <text:h text:style-name="Überschrift2" text:outline-level="2"><text:bookmark-start text:name="_Toc230084823"/>User<text:bookmark-end text:name="_Toc230084823"/></text:h>
      <text:p text:style-name="Standard"><text:span text:style-name="T88">Alle Gruppenchats sehen</text:span><text:span text:style-name="T89">  </text:span></text:p>
      <text:p text:style-name="Standard"><text:span text:style-name="T90">Als User möchte ich alle existierenden Gruppenchats sehen, damit ich entscheiden kann, welchem Chat ich beitreten möchte.</text:span><text:span text:style-name="T91">  </text:span></text:p>
      <text:list text:style-name="LFO4" text:continue-numbering="true">
        <text:list-item>
          <text:p text:style-name="P92"><text:span text:style-name="T93">Akzeptanzkriterien:</text:span></text:p>
          <text:list text:continue-numbering="true">
            <text:list-item>
              <text:p text:style-name="P94">Beim Öffnen der App werden alle Gruppen angezeigt</text:p>
            </text:list-item>
            <text:list-item>
              <text:p text:style-name="P95">Gruppen enthalten Titel und Owner‑Info</text:p>
            </text:list-item>
          </text:list>
        </text:list-item>
      </text:list>
      <text:p text:style-name="Standard"><text:span text:style-name="T96">Gruppentitel sehen</text:span><text:span text:style-name="T97">  </text:span></text:p>
      <text:p text:style-name="Standard"><text:span text:style-name="T98">Als User möchte ich den Titel eines Gruppenchats sehen, damit ich weiß, worum es in der Gruppe geht.</text:span><text:span text:style-name="T99">  </text:span></text:p>
      <text:list text:style-name="LFO5" text:continue-numbering="true">
        <text:list-item>
          <text:p text:style-name="P100"><text:span text:style-name="T101">Akzeptanzkriterien:</text:span></text:p>
          <text:list text:continue-numbering="true">
            <text:list-item>
              <text:p text:style-name="P102">Titel wird in der Gruppenliste angezeigt</text:p>
            </text:list-item>
            <text:list-item>
              <text:p text:style-name="P103">Titel wird im Chat‑Header angezeigt</text:p>
            </text:list-item>
          </text:list>
        </text:list-item>
      </text:list>
      <text:p text:style-name="Standard"><text:span text:style-name="T104">Join</text:span><text:span text:style-name="T105">‑Request senden</text:span><text:span text:style-name="T106">  </text:span></text:p>
      <text:p text:style-name="Standard"><text:span text:style-name="T107">Als User möchte ich eine Beitrittsanfrage senden, damit ich Mitglied werden kann.</text:span><text:span text:style-name="T108">  </text:span></text:p>
      <text:list text:style-name="LFO7" text:continue-numbering="true">
        <text:list-item>
          <text:p text:style-name="P109"><text:span text:style-name="T110">Akzeptanzkriterien:</text:span></text:p>
          <text:list text:continue-numbering="true">
            <text:list-item>
              <text:p text:style-name="P111">Button „Join“ sichtbar</text:p>
            </text:list-item>
            <text:list-item>
              <text:p text:style-name="P112">Nach Klick wird Request gespeichert</text:p>
            </text:list-item>
            <text:list-item>
              <text:p text:style-name="P113">Owner sieht den Request</text:p>
            </text:list-item>
          </text:list>
        </text:list-item>
      </text:list>
      <text:h text:style-name="Überschrift2" text:outline-level="2"><text:bookmark-start text:name="_Toc230084824"/>Gruppenchat‑Member<text:bookmark-end text:name="_Toc230084824"/></text:h>
      <text:h text:style-name="Überschrift3" text:outline-level="3"><text:bookmark-start text:name="_Toc230084825"/>Nachrichten senden<text:bookmark-end text:name="_Toc230084825"/>  </text:h>
      <text:p text:style-name="Standard"><text:span text:style-name="T114">Als Member möchte ich Nachrichten schreiben, damit ich kommunizieren kann.</text:span><text:span text:style-name="T115">  </text:span></text:p>
      <text:soft-page-break/>
      <text:list text:style-name="LFO9" text:continue-numbering="true">
        <text:list-item>
          <text:p text:style-name="P116"><text:span text:style-name="T117">Akzeptanzkriterien:</text:span></text:p>
          <text:list text:continue-numbering="true">
            <text:list-item>
              <text:p text:style-name="P118">Eingabefeld sichtbar</text:p>
            </text:list-item>
            <text:list-item>
              <text:p text:style-name="P119">Nachricht erscheint sofort im Chat</text:p>
            </text:list-item>
          </text:list>
        </text:list-item>
      </text:list>
      <text:h text:style-name="Überschrift3" text:outline-level="3"><text:bookmark-start text:name="_Toc230084826"/>Nachrichten lesen<text:bookmark-end text:name="_Toc230084826"/>  </text:h>
      <text:p text:style-name="Standard"><text:span text:style-name="T120">Als Member möchte ich alle Nachrichten sehen, damit ich den Verlauf nachvollziehen kann.</text:span><text:span text:style-name="T121">  </text:span></text:p>
      <text:list text:style-name="LFO11" text:continue-numbering="true">
        <text:list-item>
          <text:p text:style-name="P122"><text:span text:style-name="T123">Akzeptanzkriterien:</text:span></text:p>
          <text:list text:continue-numbering="true">
            <text:list-item>
              <text:p text:style-name="P124">Nachrichten werden chronologisch angezeigt</text:p>
            </text:list-item>
            <text:list-item>
              <text:p text:style-name="P125">Neue Nachrichten erscheinen automatisch</text:p>
            </text:list-item>
          </text:list>
        </text:list-item>
      </text:list>
      <text:h text:style-name="Überschrift2" text:outline-level="2"><text:bookmark-start text:name="_Toc230084827"/>Gruppenchat‑Owner<text:bookmark-end text:name="_Toc230084827"/></text:h>
      <text:h text:style-name="Überschrift3" text:outline-level="3"><text:bookmark-start text:name="_Toc230084828"/>Join‑Requests annehmen<text:bookmark-end text:name="_Toc230084828"/>  </text:h>
      <text:list text:style-name="LFO13" text:continue-numbering="true">
        <text:list-item>
          <text:p text:style-name="P126"><text:span text:style-name="T127">Akzeptanzkriterien:</text:span></text:p>
          <text:list text:continue-numbering="true">
            <text:list-item>
              <text:p text:style-name="P128">Liste aller Requests sichtbar</text:p>
            </text:list-item>
            <text:list-item>
              <text:p text:style-name="P129">Klick auf „Accept“ macht User zum Member</text:p>
            </text:list-item>
          </text:list>
        </text:list-item>
      </text:list>
      <text:h text:style-name="Überschrift3" text:outline-level="3"><text:bookmark-start text:name="_Toc230084829"/>Join‑Requests ablehnen<text:bookmark-end text:name="_Toc230084829"/>  </text:h>
      <text:list text:style-name="LFO15" text:continue-numbering="true">
        <text:list-item>
          <text:p text:style-name="P130"><text:span text:style-name="T131">Akzeptanzkriterien:</text:span></text:p>
          <text:list text:continue-numbering="true">
            <text:list-item>
              <text:p text:style-name="P132">Klick auf „Decline“ löscht Request</text:p>
            </text:list-item>
          </text:list>
        </text:list-item>
      </text:list>
      <text:h text:style-name="Überschrift3" text:outline-level="3"><text:bookmark-start text:name="_Toc230084830"/>Mitglieder entfernen<text:bookmark-end text:name="_Toc230084830"/>  </text:h>
      <text:list text:style-name="LFO17" text:continue-numbering="true">
        <text:list-item>
          <text:p text:style-name="P133"><text:span text:style-name="T134">Akzeptanzkriterien:</text:span></text:p>
          <text:list text:continue-numbering="true">
            <text:list-item>
              <text:p text:style-name="P135">Owner sieht Mitgliederliste</text:p>
            </text:list-item>
            <text:list-item>
              <text:p text:style-name="P136">Klick auf „Kick“ entfernt Member</text:p>
            </text:list-item>
          </text:list>
        </text:list-item>
      </text:list>
      <text:h text:style-name="Überschrift2" text:outline-level="2"><text:bookmark-start text:name="_Toc230084831"/>Admin<text:bookmark-end text:name="_Toc230084831"/></text:h>
      <text:h text:style-name="Überschrift3" text:outline-level="3"><text:bookmark-start text:name="_Toc230084832"/>Gruppenchats löschen<text:bookmark-end text:name="_Toc230084832"/>  </text:h>
      <text:list text:style-name="LFO19" text:continue-numbering="true">
        <text:list-item>
          <text:p text:style-name="P137"><text:span text:style-name="T138">Akzeptanzkriterien:</text:span></text:p>
          <text:list text:continue-numbering="true">
            <text:list-item>
              <text:p text:style-name="P139">Admin sieht alle Gruppen</text:p>
            </text:list-item>
            <text:list-item>
              <text:p text:style-name="P140">Klick auf „Delete“ entfernt Gruppe inkl. Nachrichten</text:p>
            </text:list-item>
          </text:list>
        </text:list-item>
      </text:list>
      <text:h text:style-name="Überschrift1" text:outline-level="1"><text:bookmark-start text:name="_Toc230084833"/>4. Arbeitsplan<text:bookmark-end text:name="_Toc230084833"/></text:h>
      <text:p text:style-name="P141">Arbeitspakete + Aufwandsschätzung:</text:p>
      <table:table table:style-name="Table142">
        <table:table-columns>
          <table:table-column table:style-name="TableColumn143"/>
          <table:table-column table:style-name="TableColumn144"/>
          <table:table-column table:style-name="TableColumn145"/>
        </table:table-columns>
        <table:table-row table:style-name="TableRow146">
          <table:table-cell table:style-name="TableCell147">
            <text:p text:style-name="P148">Arbeitspaket</text:p>
          </table:table-cell>
          <table:table-cell table:style-name="TableCell149">
            <text:p text:style-name="P150">Beschreibung</text:p>
          </table:table-cell>
          <table:table-cell table:style-name="TableCell151">
            <text:p text:style-name="P152">Zeit</text:p>
          </table:table-cell>
        </table:table-row>
        <table:table-row table:style-name="TableRow153">
          <table:table-cell table:style-name="TableCell154">
            <text:p text:style-name="P155">Projektsetup</text:p>
          </table:table-cell>
          <table:table-cell table:style-name="TableCell156">
            <text:p text:style-name="P157">Repository erstellen, Grundstruktur für Backend &amp; Frontend anlegen, Dependencies installieren</text:p>
          </table:table-cell>
          <table:table-cell table:style-name="TableCell158">
            <text:p text:style-name="P159">1h</text:p>
          </table:table-cell>
        </table:table-row>
        <table:table-row table:style-name="TableRow160">
          <table:table-cell table:style-name="TableCell161">
            <text:p text:style-name="P162">User Stories finalisieren</text:p>
          </table:table-cell>
          <table:table-cell table:style-name="TableCell163">
            <text:p text:style-name="P164">Rollen definieren, User Stories formulieren, Akzeptanzkriterien ergänzen</text:p>
          </table:table-cell>
          <table:table-cell table:style-name="TableCell165">
            <text:p text:style-name="P166">1h</text:p>
          </table:table-cell>
        </table:table-row>
        <table:table-row table:style-name="TableRow167">
          <table:table-cell table:style-name="TableCell168">
            <text:p text:style-name="P169">Backend Grundfunktionen</text:p>
          </table:table-cell>
          <table:table-cell table:style-name="TableCell170">
            <text:p text:style-name="P171">Entities, Controller, Services, Gruppen‑<text:s/>und Nachrichtenlogik implementieren</text:p>
          </table:table-cell>
          <table:table-cell table:style-name="TableCell172">
            <text:p text:style-name="P173">3h</text:p>
          </table:table-cell>
        </table:table-row>
        <table:table-row table:style-name="TableRow174">
          <table:table-cell table:style-name="TableCell175">
            <text:p text:style-name="P176">Join‑Request Logik</text:p>
          </table:table-cell>
          <table:table-cell table:style-name="TableCell177">
            <text:p text:style-name="P178">Join‑Requests senden, annehmen, ablehnen; Rollenlogik umsetzen</text:p>
          </table:table-cell>
          <table:table-cell table:style-name="TableCell179">
            <text:p text:style-name="P180">1.5h</text:p>
          </table:table-cell>
        </table:table-row>
        <table:table-row table:style-name="TableRow181">
          <table:table-cell table:style-name="TableCell182">
            <text:p text:style-name="P183">JWT‑Authentifizierung Backend</text:p>
          </table:table-cell>
          <table:table-cell table:style-name="TableCell184">
            <text:p text:style-name="P185">Login, Token‑Erstellung, Security‑Filter implementieren</text:p>
          </table:table-cell>
          <table:table-cell table:style-name="TableCell186">
            <text:p text:style-name="P187">2h</text:p>
          </table:table-cell>
        </table:table-row>
        <table:table-row table:style-name="TableRow188">
          <table:table-cell table:style-name="TableCell189">
            <text:p text:style-name="P190">Backend Tests</text:p>
          </table:table-cell>
          <table:table-cell table:style-name="TableCell191">
            <text:p text:style-name="P192">Zwei automatisierte Tests (Join‑Request, Nachricht speichern) schreiben</text:p>
          </table:table-cell>
          <table:table-cell table:style-name="TableCell193">
            <text:p text:style-name="P194">1h</text:p>
          </table:table-cell>
        </table:table-row>
        <table:table-row table:style-name="TableRow195">
          <table:table-cell table:style-name="TableCell196">
            <text:p text:style-name="P197">Frontend UI</text:p>
          </table:table-cell>
          <table:table-cell table:style-name="TableCell198">
            <text:p text:style-name="P199">Layout, Navigation, Gruppenliste und Chat‑Ansicht erstellen</text:p>
          </table:table-cell>
          <table:table-cell table:style-name="TableCell200">
            <text:p text:style-name="P201">2.5h</text:p>
          </table:table-cell>
        </table:table-row>
        <table:table-row table:style-name="TableRow202">
          <table:table-cell table:style-name="TableCell203">
            <text:p text:style-name="P204">Frontend API‑Integration</text:p>
          </table:table-cell>
          <table:table-cell table:style-name="TableCell205">
            <text:p text:style-name="P206">Login, Token‑Handling, Gruppen‑<text:s/>und Nachrichten‑Requests anbinden</text:p>
          </table:table-cell>
          <table:table-cell table:style-name="TableCell207">
            <text:p text:style-name="P208">2h</text:p>
          </table:table-cell>
        </table:table-row>
        <table:table-row table:style-name="TableRow209">
          <table:table-cell table:style-name="TableCell210">
            <text:p text:style-name="P211">Frontend Tests</text:p>
          </table:table-cell>
          <table:table-cell table:style-name="TableCell212">
            <text:p text:style-name="P213">Zwei automatisierte Tests schreiben</text:p>
          </table:table-cell>
          <table:table-cell table:style-name="TableCell214">
            <text:p text:style-name="P215">1h</text:p>
          </table:table-cell>
        </table:table-row>
        <table:table-row table:style-name="TableRow216">
          <table:table-cell table:style-name="TableCell217">
            <text:p text:style-name="P218">Sicherheitskonzept</text:p>
          </table:table-cell>
          <table:table-cell table:style-name="TableCell219">
            <text:p text:style-name="P220">Rollen, Token‑Sicherheit, CORS‑Konfiguration dokumentieren</text:p>
          </table:table-cell>
          <table:table-cell table:style-name="TableCell221">
            <text:p text:style-name="P222">1h</text:p>
          </table:table-cell>
        </table:table-row>
        <table:table-row table:style-name="TableRow223">
          <table:table-cell table:style-name="TableCell224">
            <text:p text:style-name="P225">Deployment Anleitung</text:p>
          </table:table-cell>
          <table:table-cell table:style-name="TableCell226">
            <text:p text:style-name="P227">Startanleitung für Backend &amp; Frontend, Ports und Umgebungsvariablen dokumentieren</text:p>
          </table:table-cell>
          <table:table-cell table:style-name="TableCell228">
            <text:p text:style-name="P229">1h</text:p>
          </table:table-cell>
        </table:table-row>
        <text:soft-page-break/>
        <table:table-row table:style-name="TableRow230">
          <table:table-cell table:style-name="TableCell231">
            <text:p text:style-name="P232">Dokumentation</text:p>
          </table:table-cell>
          <table:table-cell table:style-name="TableCell233">
            <text:p text:style-name="P234">Architektur, Tests, Auswertung, Screenshots erstellen</text:p>
          </table:table-cell>
          <table:table-cell table:style-name="TableCell235">
            <text:p text:style-name="P236">2–3h</text:p>
          </table:table-cell>
        </table:table-row>
        <table:table-row table:style-name="TableRow237">
          <table:table-cell table:style-name="TableCell238">
            <text:p text:style-name="P239">Präsentation (8 Minuten)</text:p>
          </table:table-cell>
          <table:table-cell table:style-name="TableCell240">
            <text:p text:style-name="P241">Struktur, Sprechertext, Demo‑Ablauf vorbereiten</text:p>
          </table:table-cell>
          <table:table-cell table:style-name="TableCell242">
            <text:p text:style-name="P243">1h</text:p>
          </table:table-cell>
        </table:table-row>
      </table:table>
      <text:p text:style-name="P244"/>
      <text:h text:style-name="Überschrift1" text:outline-level="1"><text:bookmark-start text:name="_Toc230084834"/>5. Backend‑Architektur<text:bookmark-end text:name="_Toc230084834"/></text:h>
      <text:p text:style-name="P245"><text:bookmark-start text:name="_Toc230084835"/><text:span text:style-name="T246">🔹</text:span><text:s/>Spring‑Boot REST‑API</text:p>
      <text:p text:style-name="P247">Das Backend besteht aus einer klassischen REST‑API: Controller nehmen Requests entgegen und liefern JSON‑Antworten zurück.</text:p>
      <text:p text:style-name="P248"><text:span text:style-name="T249">🔹</text:span><text:s/>JPA/Hibernate Persistenz</text:p>
      <text:p text:style-name="P250">Daten werden in MySQL gespeichert. Wichtige Entities: User, ChatGroup, GroupMember, Message.</text:p>
      <text:p text:style-name="P251"><text:span text:style-name="T252">🔹</text:span><text:s/>Repositories</text:p>
      <text:p text:style-name="P253">Spring Data JPA übernimmt alle DB‑Operationen automatisch (z.<text:span text:style-name="T254"> </text:span>B. Nachrichten laden, Mitgliedschaften pr<text:span text:style-name="T255">ü</text:span>fen).</text:p>
      <text:p text:style-name="P256"><text:span text:style-name="T257">🔹</text:span><text:s/>JWT‑Authentifizierung</text:p>
      <text:p text:style-name="P258">Login erzeugt ein JWT‑Token. Jeder Request wird damit authentifiziert und Rollen werden geprüft.</text:p>
      <text:p text:style-name="P259"><text:span text:style-name="T260">🔹</text:span><text:s/>Rollen &amp; Logik</text:p>
      <text:p text:style-name="P261">Owner, Member und Admin haben unterschiedliche Rechte (z.<text:span text:style-name="T262"> </text:span>B. Gruppe l<text:span text:style-name="T263">ö</text:span>schen, Nachrichten senden, Join‑Requests annehmen).</text:p>
      <text:p text:style-name="P264"><text:span text:style-name="T265">🔹</text:span><text:s/>Transaktionen</text:p>
      <text:p text:style-name="P266">Kritische Vorgänge wie Gruppen löschen laufen in einer DB‑Transaktion, damit keine halben Zustände entstehen.</text:p>
      <text:h text:style-name="Überschrift1" text:outline-level="1">6. Backend‑Tests<text:bookmark-end text:name="_Toc230084835"/></text:h>
      <text:p text:style-name="P267">Mindestens zwei automatisierte Tests:</text:p>
      <text:list text:style-name="LFO21" text:continue-numbering="true">
        <text:list-item>
          <text:p text:style-name="P268">Test 1: Join‑Request wird korrekt gespeichert</text:p>
        </text:list-item>
        <text:list-item>
          <text:p text:style-name="P269">Test 2: Nachricht wird korrekt persistiert</text:p>
        </text:list-item>
      </text:list>
      <text:p text:style-name="P270">Beide Tests enthalten:</text:p>
      <text:soft-page-break/>
      <text:list text:style-name="LFO22" text:continue-numbering="true">
        <text:list-item>
          <text:p text:style-name="P271">Setup</text:p>
        </text:list-item>
        <text:list-item>
          <text:p text:style-name="P272">Action</text:p>
        </text:list-item>
        <text:list-item>
          <text:p text:style-name="P273">Assertion</text:p>
        </text:list-item>
      </text:list>
      <text:h text:style-name="Überschrift1" text:outline-level="1"><text:bookmark-start text:name="_Toc230084836"/>7. Frontend‑Architektur<text:bookmark-end text:name="_Toc230084836"/></text:h>
      <text:p text:style-name="Standard"><text:span text:style-name="T274">🔹</text:span><text:span text:style-name="T275"><text:s/>React Single</text:span><text:span text:style-name="T276">‑Page</text:span><text:span text:style-name="T277">‑App</text:span></text:p>
      <text:list text:style-name="LFO38" text:continue-numbering="true">
        <text:list-item>
          <text:p text:style-name="P278">React + Vite</text:p>
        </text:list-item>
        <text:list-item>
          <text:p text:style-name="P279">Kommuniziert per REST‑API mit dem Backend (Axios)</text:p>
        </text:list-item>
      </text:list>
      <text:p text:style-name="Standard"><text:span text:style-name="T280">🔹</text:span><text:span text:style-name="T281"><text:s/>Projektstruktur</text:span></text:p>
      <text:list text:style-name="LFO39" text:continue-numbering="true">
        <text:list-item>
          <text:p text:style-name="P282">main.jsx → App‑Start + Router</text:p>
        </text:list-item>
        <text:list-item>
          <text:p text:style-name="P283">Pages: Login, Groups, Chat</text:p>
        </text:list-item>
        <text:list-item>
          <text:p text:style-name="P284">API‑Layer: zentrale Axios‑Instanz mit Token‑Interceptor</text:p>
        </text:list-item>
        <text:list-item>
          <text:p text:style-name="P285">Globales Styling in index.css</text:p>
        </text:list-item>
      </text:list>
      <text:p text:style-name="Standard"><text:span text:style-name="T286">🔹</text:span><text:span text:style-name="T287"><text:s/>Routing</text:span></text:p>
      <text:list text:style-name="LFO40" text:continue-numbering="true">
        <text:list-item>
          <text:p text:style-name="P288">React Router für /login, /groups, /groups/:id</text:p>
        </text:list-item>
        <text:list-item>
          <text:p text:style-name="P289">Geschützte Bereiche prüfen JWT im localStorage</text:p>
        </text:list-item>
      </text:list>
      <text:p text:style-name="Standard"><text:span text:style-name="T290">🔹</text:span><text:span text:style-name="T291"><text:s/>State Management</text:span></text:p>
      <text:list text:style-name="LFO41" text:continue-numbering="true">
        <text:list-item>
          <text:p text:style-name="P292">useState / useEffect für lokalen UI‑State</text:p>
        </text:list-item>
        <text:list-item>
          <text:p text:style-name="P293">Kein globaler Store → Daten werden bei Bedarf neu geladen</text:p>
        </text:list-item>
      </text:list>
      <text:p text:style-name="Standard"><text:span text:style-name="T294">🔹</text:span><text:span text:style-name="T295"><text:s/>API</text:span><text:span text:style-name="T296">‑Integration</text:span></text:p>
      <text:list text:style-name="LFO42" text:continue-numbering="true">
        <text:list-item>
          <text:p text:style-name="P297">Axios‑Instanz setzt Base‑URL + Authorization Header</text:p>
        </text:list-item>
        <text:list-item>
          <text:p text:style-name="P298">Komponenten rufen REST‑Endpoints direkt auf</text:p>
        </text:list-item>
        <text:list-item>
          <text:p text:style-name="P299">Fehler werden lokal angezeigt</text:p>
        </text:list-item>
      </text:list>
      <text:p text:style-name="Standard"><text:span text:style-name="T300">🔹</text:span><text:span text:style-name="T301"><text:s/>Authentifizierung</text:span></text:p>
      <text:soft-page-break/>
      <text:list text:style-name="LFO43" text:continue-numbering="true">
        <text:list-item>
          <text:p text:style-name="P302">Login speichert JWT in localStorage</text:p>
        </text:list-item>
        <text:list-item>
          <text:p text:style-name="P303">Axios fügt Token automatisch hinzu</text:p>
        </text:list-item>
        <text:list-item>
          <text:p text:style-name="P304">UI zeigt Buttons abhängig von Rollen/Backend‑Antworten</text:p>
        </text:list-item>
      </text:list>
      <text:p text:style-name="Standard"><text:span text:style-name="T305">🔹</text:span><text:span text:style-name="T306"><text:s/>UI</text:span><text:span text:style-name="T307">‑Komponenten</text:span></text:p>
      <text:list text:style-name="LFO44" text:continue-numbering="true">
        <text:list-item>
          <text:p text:style-name="P308">Pages laden Daten und rendern Listen/Formulare</text:p>
        </text:list-item>
        <text:list-item>
          <text:p text:style-name="P309">Einfaches globales CSS für Layout &amp; Buttons</text:p>
        </text:list-item>
      </text:list>
      <text:p text:style-name="Standard"><text:span text:style-name="T310">🔹</text:span><text:span text:style-name="T311"><text:s/>Testing</text:span></text:p>
      <text:list text:style-name="LFO45" text:continue-numbering="true">
        <text:list-item>
          <text:p text:style-name="P312">Vitest + Testing Library</text:p>
        </text:list-item>
        <text:list-item>
          <text:p text:style-name="P313"><text:span text:style-name="T314">Tests prüfen Rendering &amp; Interaktionen (z.</text:span><text:span text:style-name="T315"> </text:span><text:span text:style-name="T316">B. Nachricht erscheint)</text:span></text:p>
        </text:list-item>
      </text:list>
      <text:p text:style-name="P317"/>
      <text:h text:style-name="Überschrift1" text:outline-level="1"><text:bookmark-start text:name="_Toc230084837"/>8. Frontend‑Tests<text:bookmark-end text:name="_Toc230084837"/></text:h>
      <text:p text:style-name="P318">Mindestens zwei Tests:</text:p>
      <text:list text:style-name="LFO23" text:continue-numbering="true">
        <text:list-item>
          <text:p text:style-name="P319">Rendering‑Test der Gruppenliste</text:p>
        </text:list-item>
        <text:list-item>
          <text:p text:style-name="P320">Test: Nachricht wird nach Eingabe angezeigt</text:p>
        </text:list-item>
      </text:list>
      <text:h text:style-name="Überschrift1" text:outline-level="1"><text:bookmark-start text:name="_Toc230084838"/>9. JWT‑Authentifizierung<text:bookmark-end text:name="_Toc230084838"/></text:h>
      <text:p text:style-name="P321">Ablauf:</text:p>
      <text:list text:style-name="LFO24" text:continue-numbering="true">
        <text:list-item>
          <text:p text:style-name="P322">User loggt sich ein</text:p>
        </text:list-item>
        <text:list-item>
          <text:p text:style-name="P323">Backend generiert JWT</text:p>
        </text:list-item>
        <text:list-item>
          <text:p text:style-name="P324">Frontend speichert Token (localStorage)</text:p>
        </text:list-item>
        <text:list-item>
          <text:p text:style-name="P325">Jeder Request sendet Authorization: Bearer &lt;token&gt;</text:p>
        </text:list-item>
        <text:list-item>
          <text:p text:style-name="P326">Backend validiert Token über Filter</text:p>
        </text:list-item>
      </text:list>
      <text:h text:style-name="Überschrift1" text:outline-level="1"><text:bookmark-start text:name="_Toc230084839"/><text:soft-page-break/>10. Sicherheitskonzept<text:bookmark-end text:name="_Toc230084839"/></text:h>
      <text:list text:style-name="LFO25" text:continue-numbering="true">
        <text:list-item>
          <text:p text:style-name="P327">Passwort‑Hashing (BCrypt)</text:p>
        </text:list-item>
        <text:list-item>
          <text:p text:style-name="P328">Token‑Sicherheit (Expiration, Signature)</text:p>
        </text:list-item>
        <text:list-item>
          <text:p text:style-name="P329">CORS‑Konfiguration</text:p>
        </text:list-item>
        <text:list-item>
          <text:p text:style-name="P330">Rollen‑basiertes Routing</text:p>
        </text:list-item>
        <text:list-item>
          <text:p text:style-name="P331">Schutz vor SQL‑Injection durch JPA</text:p>
        </text:list-item>
        <text:list-item>
          <text:p text:style-name="P332">Schutz vor XSS durch React‑Escaping</text:p>
        </text:list-item>
      </text:list>
      <text:h text:style-name="Überschrift1" text:outline-level="1"><text:bookmark-start text:name="_Toc230084840"/>11. Arbeitsjournal<text:bookmark-end text:name="_Toc230084840"/></text:h>
      <text:p text:style-name="P333">Für jeden Block:</text:p>
      <table:table table:style-name="Table334">
        <table:table-columns>
          <table:table-column table:style-name="TableColumn335"/>
          <table:table-column table:style-name="TableColumn336"/>
          <table:table-column table:style-name="TableColumn337"/>
          <table:table-column table:style-name="TableColumn338"/>
        </table:table-columns>
        <table:table-header-rows>
          <table:table-row table:style-name="TableRow339">
            <table:table-cell table:style-name="TableCell340">
              <text:p text:style-name="Standard"><text:a xlink:href="ca://s?q=Arbeitsjournal_Datum" office:target-frame-name="_top" xlink:show="replace"><text:span text:style-name="T341">Datum</text:span></text:a></text:p>
            </table:table-cell>
            <table:table-cell table:style-name="TableCell342">
              <text:p text:style-name="Standard"><text:a xlink:href="ca://s?q=Arbeitsjournal_Aufgabe" office:target-frame-name="_top" xlink:show="replace"><text:span text:style-name="T343">Aufgabe</text:span></text:a></text:p>
            </table:table-cell>
            <table:table-cell table:style-name="TableCell344">
              <text:p text:style-name="Standard"><text:a xlink:href="ca://s?q=Arbeitsjournal_Beschreibung" office:target-frame-name="_top" xlink:show="replace"><text:span text:style-name="T345">Beschreibung</text:span></text:a></text:p>
            </table:table-cell>
            <table:table-cell table:style-name="TableCell346">
              <text:p text:style-name="Standard"><text:a xlink:href="ca://s?q=Arbeitsjournal_Dauer" office:target-frame-name="_top" xlink:show="replace"><text:span text:style-name="T347">Dauer</text:span></text:a></text:p>
            </table:table-cell>
          </table:table-row>
        </table:table-header-rows>
        <table:table-row table:style-name="TableRow348">
          <table:table-cell table:style-name="TableCell349">
            <text:p text:style-name="Standard">12.05.2026</text:p>
          </table:table-cell>
          <table:table-cell table:style-name="TableCell350">
            <text:p text:style-name="Standard">Projekt Grundstruktur</text:p>
          </table:table-cell>
          <table:table-cell table:style-name="TableCell351">
            <text:p text:style-name="Standard">Git‑Repo erstellt, Backend/Frontend Grundgerüst angelegt</text:p>
          </table:table-cell>
          <table:table-cell table:style-name="TableCell352">
            <text:p text:style-name="Standard">1h</text:p>
          </table:table-cell>
        </table:table-row>
        <table:table-row table:style-name="TableRow353">
          <table:table-cell table:style-name="TableCell354">
            <text:p text:style-name="Standard">12.05.2026</text:p>
          </table:table-cell>
          <table:table-cell table:style-name="TableCell355">
            <text:p text:style-name="Standard">Git verbunden</text:p>
          </table:table-cell>
          <table:table-cell table:style-name="TableCell356">
            <text:p text:style-name="Standard">Lokales Projekt mit GitHub verknüpft, erster Commit</text:p>
          </table:table-cell>
          <table:table-cell table:style-name="TableCell357">
            <text:p text:style-name="Standard">0.5h</text:p>
          </table:table-cell>
        </table:table-row>
        <table:table-row table:style-name="TableRow358">
          <table:table-cell table:style-name="TableCell359">
            <text:p text:style-name="Standard">12.05.2026</text:p>
          </table:table-cell>
          <table:table-cell table:style-name="TableCell360">
            <text:p text:style-name="Standard">User Stories</text:p>
          </table:table-cell>
          <table:table-cell table:style-name="TableCell361">
            <text:p text:style-name="Standard">Rollen definiert, erste User Stories formuliert</text:p>
          </table:table-cell>
          <table:table-cell table:style-name="TableCell362">
            <text:p text:style-name="Standard">1h</text:p>
          </table:table-cell>
        </table:table-row>
        <table:table-row table:style-name="TableRow363">
          <table:table-cell table:style-name="TableCell364">
            <text:p text:style-name="Standard">12.05.2026</text:p>
          </table:table-cell>
          <table:table-cell table:style-name="TableCell365">
            <text:p text:style-name="Standard">Projekt Pitch</text:p>
          </table:table-cell>
          <table:table-cell table:style-name="TableCell366">
            <text:p text:style-name="Standard">Projektidee ausgearbeitet und dokumentiert</text:p>
          </table:table-cell>
          <table:table-cell table:style-name="TableCell367">
            <text:p text:style-name="Standard">0.5h</text:p>
          </table:table-cell>
        </table:table-row>
        <table:table-row table:style-name="TableRow368">
          <table:table-cell table:style-name="TableCell369">
            <text:p text:style-name="Standard">17.05.2026</text:p>
          </table:table-cell>
          <table:table-cell table:style-name="TableCell370">
            <text:p text:style-name="Standard">Backend fertiggestellt</text:p>
          </table:table-cell>
          <table:table-cell table:style-name="TableCell371">
            <text:p text:style-name="Standard">Backend‑Funktionen, Rollenlogik, Join‑Functions, Messaging abgeschlossen</text:p>
          </table:table-cell>
          <table:table-cell table:style-name="TableCell372">
            <text:p text:style-name="Standard">3h</text:p>
          </table:table-cell>
        </table:table-row>
        <table:table-row table:style-name="TableRow373">
          <table:table-cell table:style-name="TableCell374">
            <text:p text:style-name="Standard">17.05.2026</text:p>
          </table:table-cell>
          <table:table-cell table:style-name="TableCell375">
            <text:p text:style-name="Standard">Dokumentation begonnen</text:p>
          </table:table-cell>
          <table:table-cell table:style-name="TableCell376">
            <text:p text:style-name="Standard">Erste Kapitel erstellt (Einleitung, Rollen, User Stories, Arbeitsjournal)</text:p>
          </table:table-cell>
          <table:table-cell table:style-name="TableCell377">
            <text:p text:style-name="Standard">1h</text:p>
          </table:table-cell>
        </table:table-row>
        <table:table-row table:style-name="TableRow378">
          <table:table-cell table:style-name="TableCell379">
            <text:p text:style-name="Standard">19.05.2026</text:p>
          </table:table-cell>
          <table:table-cell table:style-name="TableCell380">
            <text:p text:style-name="Standard">Frontend fertiggestellt</text:p>
          </table:table-cell>
          <table:table-cell table:style-name="TableCell381">
            <text:p text:style-name="Standard">UI finalisiert, API‑Integration abgeschlossen</text:p>
          </table:table-cell>
          <table:table-cell table:style-name="TableCell382">
            <text:p text:style-name="Standard">2h</text:p>
          </table:table-cell>
        </table:table-row>
        <table:table-row table:style-name="TableRow383">
          <table:table-cell table:style-name="TableCell384">
            <text:p text:style-name="Standard">19.05.2026</text:p>
          </table:table-cell>
          <table:table-cell table:style-name="TableCell385">
            <text:p text:style-name="Standard">Tests erstellt</text:p>
          </table:table-cell>
          <table:table-cell table:style-name="TableCell386">
            <text:p text:style-name="Standard">Frontend‑<text:s/>und Backend‑Tests implementiert und ausgeführt</text:p>
          </table:table-cell>
          <table:table-cell table:style-name="TableCell387">
            <text:p text:style-name="Standard">1h</text:p>
          </table:table-cell>
        </table:table-row>
        <text:soft-page-break/>
        <table:table-row table:style-name="TableRow388">
          <table:table-cell table:style-name="TableCell389">
            <text:p text:style-name="Standard">19.05.2026</text:p>
          </table:table-cell>
          <table:table-cell table:style-name="TableCell390">
            <text:p text:style-name="Standard">Code verbessert</text:p>
          </table:table-cell>
          <table:table-cell table:style-name="TableCell391">
            <text:p text:style-name="Standard">Refactoring, Fehlerbehebungen, Struktur optimiert</text:p>
          </table:table-cell>
          <table:table-cell table:style-name="TableCell392">
            <text:p text:style-name="Standard">1h</text:p>
          </table:table-cell>
        </table:table-row>
        <table:table-row table:style-name="TableRow393">
          <table:table-cell table:style-name="TableCell394">
            <text:p text:style-name="Standard">19.05.2026</text:p>
          </table:table-cell>
          <table:table-cell table:style-name="TableCell395">
            <text:p text:style-name="Standard">Dokumentation finalisiert</text:p>
          </table:table-cell>
          <table:table-cell table:style-name="TableCell396">
            <text:p text:style-name="Standard">Alle Kapitel abgeschlossen,<text:s/></text:p>
          </table:table-cell>
          <table:table-cell table:style-name="TableCell397">
            <text:p text:style-name="Standard">1h</text:p>
          </table:table-cell>
        </table:table-row>
      </table:table>
      <text:h text:style-name="Überschrift1" text:outline-level="1"><text:line-break/><text:bookmark-start text:name="_Toc230084841"/>12. Soll‑Ist Vergleich<text:bookmark-end text:name="_Toc230084841"/></text:h>
      <text:p text:style-name="Standard"><text:span text:style-name="T398">Soll:</text:span><text:span text:style-name="T399"><text:s/>Voll funktionsfähiges Messaging</text:span><text:span text:style-name="T400">‑System</text:span></text:p>
      <text:p text:style-name="Standard"><text:span text:style-name="T401">Ist:</text:span><text:span text:style-name="T402"><text:s/>Alle Kernfunktionen implementiert</text:span></text:p>
      <text:p text:style-name="Standard"><text:span text:style-name="T403">Abweichungen:</text:span><text:span text:style-name="T404">  </text:span></text:p>
      <text:p text:style-name="P405">– Websocket optional<text:s/>aber nicht gemacht</text:p>
      <text:p text:style-name="P406">–<text:s/>Rollen logik teilweise durchgeführt. Admin rolle nicht wirklich implemetiert</text:p>
      <text:list text:style-name="LFO24" text:continue-numbering="true">
        <text:list-item>
          <text:list>
            <text:list-item>
              <text:p text:style-name="P407">Begründung:<text:s/>Funktion war nicht wirklich essentiell. Der Admin ist in dem Sinn einfach ich als Projekt-Owner</text:p>
            </text:list-item>
          </text:list>
        </text:list-item>
      </text:list>
      <text:p text:style-name="P408">–<text:s/>Group access control per Join Requests am Group Owner nicht implementiert</text:p>
      <text:list text:style-name="LFO24" text:continue-numbering="true">
        <text:list-item>
          <text:list>
            <text:list-item>
              <text:p text:style-name="P409">Begründung: Projekt hat sich in die länge gezogen umd erweiterte Funktionen zu implementieren können</text:p>
            </text:list-item>
          </text:list>
        </text:list-item>
      </text:list>
      <text:p text:style-name="P410">– UI minimalistisch</text:p>
      <text:h text:style-name="Überschrift1" text:outline-level="1"><text:bookmark-start text:name="_Toc230084842"/>13. Problemanalyse<text:bookmark-end text:name="_Toc230084842"/></text:h>
      <text:list text:style-name="LFO26" text:continue-numbering="true">
        <text:list-item>
          <text:p text:style-name="P411">Zeitdruck</text:p>
        </text:list-item>
        <text:list-item>
          <text:p text:style-name="P412">Rollenlogik komplexer als erwartet</text:p>
        </text:list-item>
        <text:list-item>
          <text:p text:style-name="P413">Token‑Handling im Frontend anfangs fehlerhaft</text:p>
        </text:list-item>
      </text:list>
      <text:h text:style-name="Überschrift1" text:outline-level="1"><text:bookmark-start text:name="_Toc230084843"/><text:soft-page-break/>14. Deployment‑Anleitung<text:bookmark-end text:name="_Toc230084843"/></text:h>
      <text:p text:style-name="P414">1. Projekt vorbereiten</text:p>
      <text:list text:style-name="LFO27" text:continue-numbering="true">
        <text:list-item>
          <text:p text:style-name="P415"><text:span text:style-name="T416">Stelle sicher, dass<text:s/></text:span><text:span text:style-name="T417">Backend</text:span><text:span text:style-name="T418"><text:s/>und<text:s/></text:span><text:span text:style-name="T419">Frontend</text:span><text:span text:style-name="T420"><text:s/>lokal gebaut werden können.</text:span></text:p>
        </text:list-item>
        <text:list-item>
          <text:p text:style-name="P421">Prüfe, ob alle benötigten Dateien vorhanden sind:</text:p>
          <text:list text:continue-numbering="true">
            <text:list-item>
              <text:p text:style-name="P422">Backend: pom.xml, src/main/...</text:p>
            </text:list-item>
            <text:list-item>
              <text:p text:style-name="P423">Frontend: package.json, src/...</text:p>
            </text:list-item>
            <text:list-item>
              <text:p text:style-name="P424">.env Datei (Frontend)</text:p>
            </text:list-item>
          </text:list>
        </text:list-item>
        <text:list-item>
          <text:p text:style-name="P425">Git‑Repository sollte aktuell sein.</text:p>
        </text:list-item>
      </text:list>
      <text:p text:style-name="P426">2. Backend konfigurieren</text:p>
      <text:p text:style-name="P427">2.1 Java &amp; Maven prüfen</text:p>
      <text:list text:style-name="LFO28" text:continue-numbering="true">
        <text:list-item>
          <text:p text:style-name="P428">Java 17+ installiert</text:p>
        </text:list-item>
        <text:list-item>
          <text:p text:style-name="P429">Maven installiert (mvn -v testen)</text:p>
        </text:list-item>
      </text:list>
      <text:p text:style-name="P430">2.2 application.properties prüfen</text:p>
      <text:p text:style-name="P431">Typische Inhalte:</text:p>
      <text:p text:style-name="P432">Code</text:p>
      <text:p text:style-name="P433">server.port=8080</text:p>
      <text:p text:style-name="P434">spring.datasource.url=jdbc:h2:mem:testdb</text:p>
      <text:p text:style-name="P435">spring.jpa.hibernate.ddl-auto=update</text:p>
      <text:p text:style-name="P436">jwt.secret=DEIN_SECRET</text:p>
      <text:p text:style-name="P437">2.3 Backend starten</text:p>
      <text:p text:style-name="P438">Code</text:p>
      <text:p text:style-name="P439">mvn spring-boot:run</text:p>
      <text:p text:style-name="P440">2.4 Backend testen</text:p>
      <text:list text:style-name="LFO29" text:continue-numbering="true">
        <text:list-item>
          <text:p text:style-name="P441">Browser öffnen: http://localhost:8080/api/groups</text:p>
        </text:list-item>
        <text:list-item>
          <text:p text:style-name="P442">Wenn JSON zurückkommt → Backend läuft.</text:p>
        </text:list-item>
      </text:list>
      <text:p text:style-name="P443">3. Frontend konfigurieren</text:p>
      <text:p text:style-name="P444">3.1 Node &amp; npm prüfen</text:p>
      <text:p text:style-name="P445">Code</text:p>
      <text:p text:style-name="P446">node -v</text:p>
      <text:p text:style-name="P447">npm -v</text:p>
      <text:p text:style-name="P448">3.2 .env Datei erstellen</text:p>
      <text:p text:style-name="P449">Im Frontend‑Ordner:</text:p>
      <text:p text:style-name="P450">Code</text:p>
      <text:p text:style-name="P451">REACT_APP_API_URL=http://localhost:8080</text:p>
      <text:p text:style-name="P452">3.3 Dependencies installieren</text:p>
      <text:p text:style-name="P453">Code</text:p>
      <text:p text:style-name="P454">npm install</text:p>
      <text:p text:style-name="P455">3.4 Frontend starten</text:p>
      <text:p text:style-name="P456">Code</text:p>
      <text:p text:style-name="P457">npm start</text:p>
      <text:p text:style-name="P458">3.5 Frontend testen</text:p>
      <text:list text:style-name="LFO30" text:continue-numbering="true">
        <text:list-item>
          <text:p text:style-name="P459">Browser öffnet automatisch: http://localhost:3000</text:p>
        </text:list-item>
        <text:list-item>
          <text:p text:style-name="P460">Login testen</text:p>
        </text:list-item>
        <text:list-item>
          <text:p text:style-name="P461">Gruppenliste sollte geladen werden</text:p>
        </text:list-item>
      </text:list>
      <text:p text:style-name="P462">4. Kommunikation zwischen Frontend &amp; Backend</text:p>
      <text:p text:style-name="P463">4.1 Ports</text:p>
      <text:list text:style-name="LFO31" text:continue-numbering="true">
        <text:list-item>
          <text:p text:style-name="P464"><text:span text:style-name="T465">Backend:<text:s/></text:span><text:span text:style-name="T466">8080</text:span></text:p>
        </text:list-item>
        <text:list-item>
          <text:p text:style-name="P467"><text:span text:style-name="T468">Frontend:<text:s/></text:span><text:span text:style-name="T469">3000</text:span></text:p>
        </text:list-item>
      </text:list>
      <text:soft-page-break/>
      <text:p text:style-name="P470">4.2 CORS prüfen</text:p>
      <text:p text:style-name="P471">Backend muss folgendes erlauben:</text:p>
      <text:p text:style-name="P472">Code</text:p>
      <text:p text:style-name="P473">http://localhost:3000</text:p>
      <text:p text:style-name="P474">4.3 Token Handling</text:p>
      <text:list text:style-name="LFO32" text:continue-numbering="true">
        <text:list-item>
          <text:p text:style-name="P475">Login sendet Credentials → Backend erstellt JWT</text:p>
        </text:list-item>
        <text:list-item>
          <text:p text:style-name="P476">Frontend speichert Token in localStorage</text:p>
        </text:list-item>
        <text:list-item>
          <text:p text:style-name="P477">Jeder Request enthält:</text:p>
        </text:list-item>
      </text:list>
      <text:p text:style-name="P478">Code</text:p>
      <text:p text:style-name="P479">Authorization: Bearer &lt;token&gt;</text:p>
      <text:p text:style-name="P480">5. Deployment auf Server / Hosting</text:p>
      <text:p text:style-name="Standard"><text:span text:style-name="T481">(Optional, falls du es brauchst)</text:span></text:p>
      <text:p text:style-name="P482">5.1 Backend builden</text:p>
      <text:p text:style-name="P483">Code</text:p>
      <text:p text:style-name="P484">mvn clean package</text:p>
      <text:p text:style-name="P485">Ergebnis: target/app.jar</text:p>
      <text:p text:style-name="P486">5.2 Backend starten</text:p>
      <text:p text:style-name="P487">Code</text:p>
      <text:p text:style-name="P488">java -jar app.jar</text:p>
      <text:p text:style-name="P489">5.3 Frontend builden</text:p>
      <text:p text:style-name="P490">Code</text:p>
      <text:p text:style-name="P491">npm run build</text:p>
      <text:p text:style-name="P492">5.4 Build hochladen</text:p>
      <text:list text:style-name="LFO33" text:continue-numbering="true">
        <text:list-item>
          <text:p text:style-name="P493">Ordner build/ auf Webserver kopieren</text:p>
        </text:list-item>
        <text:list-item>
          <text:p text:style-name="P494">Mit Nginx/Apache ausliefern</text:p>
        </text:list-item>
      </text:list>
      <text:p text:style-name="P495">6. Fehlerbehebung</text:p>
      <text:p text:style-name="P496">Frontend lädt keine Daten</text:p>
      <text:list text:style-name="LFO34" text:continue-numbering="true">
        <text:list-item>
          <text:p text:style-name="P497">API‑URL falsch → .env prüfen</text:p>
        </text:list-item>
        <text:list-item>
          <text:p text:style-name="P498">Backend nicht gestartet</text:p>
        </text:list-item>
      </text:list>
      <text:p text:style-name="P499">CORS Fehler</text:p>
      <text:list text:style-name="LFO35" text:continue-numbering="true">
        <text:list-item>
          <text:p text:style-name="P500">Backend erlaubt localhost:3000 nicht</text:p>
        </text:list-item>
      </text:list>
      <text:p text:style-name="P501">Token Fehler</text:p>
      <text:list text:style-name="LFO36" text:continue-numbering="true">
        <text:list-item>
          <text:p text:style-name="P502">JWT Secret unterschiedlich</text:p>
        </text:list-item>
        <text:list-item>
          <text:p text:style-name="P503">Token abgelaufen</text:p>
        </text:list-item>
      </text:list>
      <text:p text:style-name="P504">7. Deployment Abschlusscheck</text:p>
      <text:list text:style-name="LFO37" text:continue-numbering="true">
        <text:list-item>
          <text:p text:style-name="P505">Backend erreichbar?</text:p>
        </text:list-item>
        <text:list-item>
          <text:p text:style-name="P506">Frontend erreichbar?</text:p>
        </text:list-item>
        <text:list-item>
          <text:p text:style-name="P507">Login funktioniert?</text:p>
        </text:list-item>
        <text:list-item>
          <text:p text:style-name="P508">Gruppen werden geladen?</text:p>
        </text:list-item>
        <text:list-item>
          <text:p text:style-name="P509">Nachrichten können gesendet werden?</text:p>
        </text:list-item>
        <text:list-item>
          <text:p text:style-name="P510">Rollenlogik funktioniert?</text:p>
        </text:list-item>
      </text:list>
      <text:p text:style-name="P5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Absatz-Standardschriftart">
      <style:text-properties fo:color="#467886" style:text-underline-type="single" style:text-underline-style="soli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Inhaltsverzeichnisüberschrift" style:display-name="Inhaltsverzeichnisüberschrift" style:family="paragraph" style:parent-style-name="Überschrift1" style:next-style-name="Standard">
      <style:paragraph-properties fo:margin-top="0.1666in" fo:margin-bottom="0in" fo:line-height="107%"/>
      <style:text-properties style:letter-kerning="false" fo:font-size="16pt" style:font-size-asian="16pt" style:font-size-complex="16pt" fo:hyphenate="false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Verzeichnis3" style:display-name="Verzeichnis 3" style:family="paragraph" style:parent-style-name="Standard" style:next-style-name="Standard" style:auto-update="true">
      <style:paragraph-properties fo:margin-bottom="0.0694in" fo:margin-left="0.3333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2" style:family="text">
      <style:text-properties style:font-name="Aptos Display" style:font-name-asian="Times New Roman" style:font-name-complex="Times New Roman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style style:name="WW_CharLFO36LVL1" style:family="text">
      <style:text-properties style:font-name="Symbol" fo:font-size="10pt" style:font-size-asian="10pt"/>
    </style:style>
    <style:style style:name="WW_CharLFO36LVL2" style:family="text">
      <style:text-properties style:font-name="Courier New" fo:font-size="10pt" style:font-size-asian="10pt"/>
    </style:style>
    <style:style style:name="WW_CharLFO36LVL3" style:family="text">
      <style:text-properties style:font-name="Wingdings" fo:font-size="10pt" style:font-size-asian="10pt"/>
    </style:style>
    <style:style style:name="WW_CharLFO36LVL4" style:family="text">
      <style:text-properties style:font-name="Wingdings" fo:font-size="10pt" style:font-size-asian="10pt"/>
    </style:style>
    <style:style style:name="WW_CharLFO36LVL5" style:family="text">
      <style:text-properties style:font-name="Wingdings" fo:font-size="10pt" style:font-size-asian="10pt"/>
    </style:style>
    <style:style style:name="WW_CharLFO36LVL6" style:family="text">
      <style:text-properties style:font-name="Wingdings" fo:font-size="10pt" style:font-size-asian="10pt"/>
    </style:style>
    <style:style style:name="WW_CharLFO36LVL7" style:family="text">
      <style:text-properties style:font-name="Wingdings" fo:font-size="10pt" style:font-size-asian="10pt"/>
    </style:style>
    <style:style style:name="WW_CharLFO36LVL8" style:family="text">
      <style:text-properties style:font-name="Wingdings" fo:font-size="10pt" style:font-size-asian="10pt"/>
    </style:style>
    <style:style style:name="WW_CharLFO36LVL9" style:family="text">
      <style:text-properties style:font-name="Wingdings" fo:font-size="10pt" style:font-size-asian="10pt"/>
    </style:style>
    <style:style style:name="WW_CharLFO37LVL1" style:family="text">
      <style:text-properties style:font-name="Symbol" fo:font-size="10pt" style:font-size-asian="10pt"/>
    </style:style>
    <style:style style:name="WW_CharLFO37LVL2" style:family="text">
      <style:text-properties style:font-name="Courier New" fo:font-size="10pt" style:font-size-asian="10pt"/>
    </style:style>
    <style:style style:name="WW_CharLFO37LVL3" style:family="text">
      <style:text-properties style:font-name="Wingdings" fo:font-size="10pt" style:font-size-asian="10pt"/>
    </style:style>
    <style:style style:name="WW_CharLFO37LVL4" style:family="text">
      <style:text-properties style:font-name="Wingdings" fo:font-size="10pt" style:font-size-asian="10pt"/>
    </style:style>
    <style:style style:name="WW_CharLFO37LVL5" style:family="text">
      <style:text-properties style:font-name="Wingdings" fo:font-size="10pt" style:font-size-asian="10pt"/>
    </style:style>
    <style:style style:name="WW_CharLFO37LVL6" style:family="text">
      <style:text-properties style:font-name="Wingdings" fo:font-size="10pt" style:font-size-asian="10pt"/>
    </style:style>
    <style:style style:name="WW_CharLFO37LVL7" style:family="text">
      <style:text-properties style:font-name="Wingdings" fo:font-size="10pt" style:font-size-asian="10pt"/>
    </style:style>
    <style:style style:name="WW_CharLFO37LVL8" style:family="text">
      <style:text-properties style:font-name="Wingdings" fo:font-size="10pt" style:font-size-asian="10pt"/>
    </style:style>
    <style:style style:name="WW_CharLFO37LVL9" style:family="text">
      <style:text-properties style:font-name="Wingdings" fo:font-size="10pt" style:font-size-asian="10pt"/>
    </style:style>
    <style:style style:name="WW_CharLFO38LVL1" style:family="text">
      <style:text-properties style:font-name="Symbol" fo:font-size="10pt" style:font-size-asian="10pt"/>
    </style:style>
    <style:style style:name="WW_CharLFO38LVL2" style:family="text">
      <style:text-properties style:font-name="Courier New" fo:font-size="10pt" style:font-size-asian="10pt"/>
    </style:style>
    <style:style style:name="WW_CharLFO38LVL3" style:family="text">
      <style:text-properties style:font-name="Wingdings" fo:font-size="10pt" style:font-size-asian="10pt"/>
    </style:style>
    <style:style style:name="WW_CharLFO38LVL4" style:family="text">
      <style:text-properties style:font-name="Wingdings" fo:font-size="10pt" style:font-size-asian="10pt"/>
    </style:style>
    <style:style style:name="WW_CharLFO38LVL5" style:family="text">
      <style:text-properties style:font-name="Wingdings" fo:font-size="10pt" style:font-size-asian="10pt"/>
    </style:style>
    <style:style style:name="WW_CharLFO38LVL6" style:family="text">
      <style:text-properties style:font-name="Wingdings" fo:font-size="10pt" style:font-size-asian="10pt"/>
    </style:style>
    <style:style style:name="WW_CharLFO38LVL7" style:family="text">
      <style:text-properties style:font-name="Wingdings" fo:font-size="10pt" style:font-size-asian="10pt"/>
    </style:style>
    <style:style style:name="WW_CharLFO38LVL8" style:family="text">
      <style:text-properties style:font-name="Wingdings" fo:font-size="10pt" style:font-size-asian="10pt"/>
    </style:style>
    <style:style style:name="WW_CharLFO38LVL9" style:family="text">
      <style:text-properties style:font-name="Wingdings" fo:font-size="10pt" style:font-size-asian="10pt"/>
    </style:style>
    <style:style style:name="WW_CharLFO39LVL1" style:family="text">
      <style:text-properties style:font-name="Symbol" fo:font-size="10pt" style:font-size-asian="10pt"/>
    </style:style>
    <style:style style:name="WW_CharLFO39LVL2" style:family="text">
      <style:text-properties style:font-name="Courier New" fo:font-size="10pt" style:font-size-asian="10pt"/>
    </style:style>
    <style:style style:name="WW_CharLFO39LVL3" style:family="text">
      <style:text-properties style:font-name="Wingdings" fo:font-size="10pt" style:font-size-asian="10pt"/>
    </style:style>
    <style:style style:name="WW_CharLFO39LVL4" style:family="text">
      <style:text-properties style:font-name="Wingdings" fo:font-size="10pt" style:font-size-asian="10pt"/>
    </style:style>
    <style:style style:name="WW_CharLFO39LVL5" style:family="text">
      <style:text-properties style:font-name="Wingdings" fo:font-size="10pt" style:font-size-asian="10pt"/>
    </style:style>
    <style:style style:name="WW_CharLFO39LVL6" style:family="text">
      <style:text-properties style:font-name="Wingdings" fo:font-size="10pt" style:font-size-asian="10pt"/>
    </style:style>
    <style:style style:name="WW_CharLFO39LVL7" style:family="text">
      <style:text-properties style:font-name="Wingdings" fo:font-size="10pt" style:font-size-asian="10pt"/>
    </style:style>
    <style:style style:name="WW_CharLFO39LVL8" style:family="text">
      <style:text-properties style:font-name="Wingdings" fo:font-size="10pt" style:font-size-asian="10pt"/>
    </style:style>
    <style:style style:name="WW_CharLFO39LVL9" style:family="text">
      <style:text-properties style:font-name="Wingdings" fo:font-size="10pt" style:font-size-asian="10pt"/>
    </style:style>
    <style:style style:name="WW_CharLFO40LVL1" style:family="text">
      <style:text-properties style:font-name="Symbol" fo:font-size="10pt" style:font-size-asian="10pt"/>
    </style:style>
    <style:style style:name="WW_CharLFO40LVL2" style:family="text">
      <style:text-properties style:font-name="Courier New" fo:font-size="10pt" style:font-size-asian="10pt"/>
    </style:style>
    <style:style style:name="WW_CharLFO40LVL3" style:family="text">
      <style:text-properties style:font-name="Wingdings" fo:font-size="10pt" style:font-size-asian="10pt"/>
    </style:style>
    <style:style style:name="WW_CharLFO40LVL4" style:family="text">
      <style:text-properties style:font-name="Wingdings" fo:font-size="10pt" style:font-size-asian="10pt"/>
    </style:style>
    <style:style style:name="WW_CharLFO40LVL5" style:family="text">
      <style:text-properties style:font-name="Wingdings" fo:font-size="10pt" style:font-size-asian="10pt"/>
    </style:style>
    <style:style style:name="WW_CharLFO40LVL6" style:family="text">
      <style:text-properties style:font-name="Wingdings" fo:font-size="10pt" style:font-size-asian="10pt"/>
    </style:style>
    <style:style style:name="WW_CharLFO40LVL7" style:family="text">
      <style:text-properties style:font-name="Wingdings" fo:font-size="10pt" style:font-size-asian="10pt"/>
    </style:style>
    <style:style style:name="WW_CharLFO40LVL8" style:family="text">
      <style:text-properties style:font-name="Wingdings" fo:font-size="10pt" style:font-size-asian="10pt"/>
    </style:style>
    <style:style style:name="WW_CharLFO40LVL9" style:family="text">
      <style:text-properties style:font-name="Wingdings" fo:font-size="10pt" style:font-size-asian="10pt"/>
    </style:style>
    <style:style style:name="WW_CharLFO41LVL1" style:family="text">
      <style:text-properties style:font-name="Symbol" fo:font-size="10pt" style:font-size-asian="10pt"/>
    </style:style>
    <style:style style:name="WW_CharLFO41LVL2" style:family="text">
      <style:text-properties style:font-name="Courier New" fo:font-size="10pt" style:font-size-asian="10pt"/>
    </style:style>
    <style:style style:name="WW_CharLFO41LVL3" style:family="text">
      <style:text-properties style:font-name="Wingdings" fo:font-size="10pt" style:font-size-asian="10pt"/>
    </style:style>
    <style:style style:name="WW_CharLFO41LVL4" style:family="text">
      <style:text-properties style:font-name="Wingdings" fo:font-size="10pt" style:font-size-asian="10pt"/>
    </style:style>
    <style:style style:name="WW_CharLFO41LVL5" style:family="text">
      <style:text-properties style:font-name="Wingdings" fo:font-size="10pt" style:font-size-asian="10pt"/>
    </style:style>
    <style:style style:name="WW_CharLFO41LVL6" style:family="text">
      <style:text-properties style:font-name="Wingdings" fo:font-size="10pt" style:font-size-asian="10pt"/>
    </style:style>
    <style:style style:name="WW_CharLFO41LVL7" style:family="text">
      <style:text-properties style:font-name="Wingdings" fo:font-size="10pt" style:font-size-asian="10pt"/>
    </style:style>
    <style:style style:name="WW_CharLFO41LVL8" style:family="text">
      <style:text-properties style:font-name="Wingdings" fo:font-size="10pt" style:font-size-asian="10pt"/>
    </style:style>
    <style:style style:name="WW_CharLFO41LVL9" style:family="text">
      <style:text-properties style:font-name="Wingdings" fo:font-size="10pt" style:font-size-asian="10pt"/>
    </style:style>
    <style:style style:name="WW_CharLFO42LVL1" style:family="text">
      <style:text-properties style:font-name="Symbol" fo:font-size="10pt" style:font-size-asian="10pt"/>
    </style:style>
    <style:style style:name="WW_CharLFO42LVL2" style:family="text">
      <style:text-properties style:font-name="Courier New" fo:font-size="10pt" style:font-size-asian="10pt"/>
    </style:style>
    <style:style style:name="WW_CharLFO42LVL3" style:family="text">
      <style:text-properties style:font-name="Wingdings" fo:font-size="10pt" style:font-size-asian="10pt"/>
    </style:style>
    <style:style style:name="WW_CharLFO42LVL4" style:family="text">
      <style:text-properties style:font-name="Wingdings" fo:font-size="10pt" style:font-size-asian="10pt"/>
    </style:style>
    <style:style style:name="WW_CharLFO42LVL5" style:family="text">
      <style:text-properties style:font-name="Wingdings" fo:font-size="10pt" style:font-size-asian="10pt"/>
    </style:style>
    <style:style style:name="WW_CharLFO42LVL6" style:family="text">
      <style:text-properties style:font-name="Wingdings" fo:font-size="10pt" style:font-size-asian="10pt"/>
    </style:style>
    <style:style style:name="WW_CharLFO42LVL7" style:family="text">
      <style:text-properties style:font-name="Wingdings" fo:font-size="10pt" style:font-size-asian="10pt"/>
    </style:style>
    <style:style style:name="WW_CharLFO42LVL8" style:family="text">
      <style:text-properties style:font-name="Wingdings" fo:font-size="10pt" style:font-size-asian="10pt"/>
    </style:style>
    <style:style style:name="WW_CharLFO42LVL9" style:family="text">
      <style:text-properties style:font-name="Wingdings" fo:font-size="10pt" style:font-size-asian="10pt"/>
    </style:style>
    <style:style style:name="WW_CharLFO43LVL1" style:family="text">
      <style:text-properties style:font-name="Symbol" fo:font-size="10pt" style:font-size-asian="10pt"/>
    </style:style>
    <style:style style:name="WW_CharLFO43LVL2" style:family="text">
      <style:text-properties style:font-name="Courier New" fo:font-size="10pt" style:font-size-asian="10pt"/>
    </style:style>
    <style:style style:name="WW_CharLFO43LVL3" style:family="text">
      <style:text-properties style:font-name="Wingdings" fo:font-size="10pt" style:font-size-asian="10pt"/>
    </style:style>
    <style:style style:name="WW_CharLFO43LVL4" style:family="text">
      <style:text-properties style:font-name="Wingdings" fo:font-size="10pt" style:font-size-asian="10pt"/>
    </style:style>
    <style:style style:name="WW_CharLFO43LVL5" style:family="text">
      <style:text-properties style:font-name="Wingdings" fo:font-size="10pt" style:font-size-asian="10pt"/>
    </style:style>
    <style:style style:name="WW_CharLFO43LVL6" style:family="text">
      <style:text-properties style:font-name="Wingdings" fo:font-size="10pt" style:font-size-asian="10pt"/>
    </style:style>
    <style:style style:name="WW_CharLFO43LVL7" style:family="text">
      <style:text-properties style:font-name="Wingdings" fo:font-size="10pt" style:font-size-asian="10pt"/>
    </style:style>
    <style:style style:name="WW_CharLFO43LVL8" style:family="text">
      <style:text-properties style:font-name="Wingdings" fo:font-size="10pt" style:font-size-asian="10pt"/>
    </style:style>
    <style:style style:name="WW_CharLFO43LVL9" style:family="text">
      <style:text-properties style:font-name="Wingdings" fo:font-size="10pt" style:font-size-asian="10pt"/>
    </style:style>
    <style:style style:name="WW_CharLFO44LVL1" style:family="text">
      <style:text-properties style:font-name="Symbol" fo:font-size="10pt" style:font-size-asian="10pt"/>
    </style:style>
    <style:style style:name="WW_CharLFO44LVL2" style:family="text">
      <style:text-properties style:font-name="Courier New" fo:font-size="10pt" style:font-size-asian="10pt"/>
    </style:style>
    <style:style style:name="WW_CharLFO44LVL3" style:family="text">
      <style:text-properties style:font-name="Wingdings" fo:font-size="10pt" style:font-size-asian="10pt"/>
    </style:style>
    <style:style style:name="WW_CharLFO44LVL4" style:family="text">
      <style:text-properties style:font-name="Wingdings" fo:font-size="10pt" style:font-size-asian="10pt"/>
    </style:style>
    <style:style style:name="WW_CharLFO44LVL5" style:family="text">
      <style:text-properties style:font-name="Wingdings" fo:font-size="10pt" style:font-size-asian="10pt"/>
    </style:style>
    <style:style style:name="WW_CharLFO44LVL6" style:family="text">
      <style:text-properties style:font-name="Wingdings" fo:font-size="10pt" style:font-size-asian="10pt"/>
    </style:style>
    <style:style style:name="WW_CharLFO44LVL7" style:family="text">
      <style:text-properties style:font-name="Wingdings" fo:font-size="10pt" style:font-size-asian="10pt"/>
    </style:style>
    <style:style style:name="WW_CharLFO44LVL8" style:family="text">
      <style:text-properties style:font-name="Wingdings" fo:font-size="10pt" style:font-size-asian="10pt"/>
    </style:style>
    <style:style style:name="WW_CharLFO44LVL9" style:family="text">
      <style:text-properties style:font-name="Wingdings" fo:font-size="10pt" style:font-size-asian="10pt"/>
    </style:style>
    <style:style style:name="WW_CharLFO45LVL1" style:family="text">
      <style:text-properties style:font-name="Symbol" fo:font-size="10pt" style:font-size-asian="10pt"/>
    </style:style>
    <style:style style:name="WW_CharLFO45LVL2" style:family="text">
      <style:text-properties style:font-name="Courier New" fo:font-size="10pt" style:font-size-asian="10pt"/>
    </style:style>
    <style:style style:name="WW_CharLFO45LVL3" style:family="text">
      <style:text-properties style:font-name="Wingdings" fo:font-size="10pt" style:font-size-asian="10pt"/>
    </style:style>
    <style:style style:name="WW_CharLFO45LVL4" style:family="text">
      <style:text-properties style:font-name="Wingdings" fo:font-size="10pt" style:font-size-asian="10pt"/>
    </style:style>
    <style:style style:name="WW_CharLFO45LVL5" style:family="text">
      <style:text-properties style:font-name="Wingdings" fo:font-size="10pt" style:font-size-asian="10pt"/>
    </style:style>
    <style:style style:name="WW_CharLFO45LVL6" style:family="text">
      <style:text-properties style:font-name="Wingdings" fo:font-size="10pt" style:font-size-asian="10pt"/>
    </style:style>
    <style:style style:name="WW_CharLFO45LVL7" style:family="text">
      <style:text-properties style:font-name="Wingdings" fo:font-size="10pt" style:font-size-asian="10pt"/>
    </style:style>
    <style:style style:name="WW_CharLFO45LVL8" style:family="text">
      <style:text-properties style:font-name="Wingdings" fo:font-size="10pt" style:font-size-asian="10pt"/>
    </style:style>
    <style:style style:name="WW_CharLFO4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list-format-name="NLF0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list-format-name="NLF0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list-format-name="NLF0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list-format-name="NLF0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list-format-name="NLF0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ptos Display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en Arandjelovic</meta:initial-creator>
    <dc:creator>Alen Arandjelovic</dc:creator>
    <meta:creation-date>2026-05-19T08:43:00Z</meta:creation-date>
    <dc:date>2026-05-19T10:43:00Z</dc:date>
    <meta:template xlink:href="Normal" xlink:type="simple"/>
    <meta:editing-cycles>2</meta:editing-cycles>
    <meta:editing-duration>PT0S</meta:editing-duration>
    <meta:document-statistic meta:page-count="15" meta:paragraph-count="25" meta:word-count="1871" meta:character-count="12511" meta:row-count="88" meta:non-whitespace-character-count="10665"/>
  </office:meta>
</office:document-meta>
</file>